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C0000014CBE8050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empus Sans ITC" svg:font-family="'Tempus Sans IT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V Boli" svg:font-family="'MV Bol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5in" fo:margin-left="-0.075in" fo:margin-top="0in" fo:margin-bottom="0in" style:page-number="auto" table:align="left" style:writing-mode="lr-tb"/>
    </style:style>
    <style:style style:name="Table1.A" style:family="table-column">
      <style:table-column-properties style:column-width="1.691in"/>
    </style:style>
    <style:style style:name="Table1.B" style:family="table-column">
      <style:table-column-properties style:column-width="4.95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Arial1" fo:font-size="11pt" fo:font-weight="bold" style:font-size-asian="11pt" style:font-weight-asian="bold" style:font-name-complex="Arial2" style:font-size-complex="11pt"/>
    </style:style>
    <style:style style:name="P3" style:family="paragraph" style:parent-style-name="Standard">
      <style:text-properties style:font-name="Arial1" fo:font-size="11pt" style:font-size-asian="11pt" style:font-name-complex="Arial2" style:font-size-complex="11pt"/>
    </style:style>
    <style:style style:name="P4" style:family="paragraph" style:parent-style-name="Standard">
      <style:text-properties style:font-name="Arial1" fo:font-size="11pt" fo:font-weight="normal" style:font-size-asian="11pt" style:font-weight-asian="normal" style:font-name-complex="Arial2" style:font-size-complex="11pt" style:font-weight-complex="normal"/>
    </style:style>
    <style:style style:name="P5" style:family="paragraph" style:parent-style-name="Standard">
      <style:text-properties fo:font-size="11pt" style:font-size-asian="11pt" style:font-size-complex="11pt"/>
    </style:style>
    <style:style style:name="P6" style:family="paragraph" style:parent-style-name="Standard">
      <style:text-properties style:font-name="Georgia" fo:font-size="14pt" fo:font-weight="bold" style:font-size-asian="14pt" style:font-weight-asian="bold" style:font-size-complex="14pt"/>
    </style:style>
    <style:style style:name="P7" style:family="paragraph" style:parent-style-name="Standard">
      <style:text-properties style:font-name="Arial" fo:font-size="11pt" style:font-size-asian="11pt" style:font-size-complex="11pt"/>
    </style:style>
    <style:style style:name="P8" style:family="paragraph" style:parent-style-name="Standard">
      <style:paragraph-properties fo:margin-top="0in" fo:margin-bottom="0in"/>
      <style:text-properties style:font-name="Arial1" fo:font-size="11pt" style:font-size-asian="11pt" style:font-name-complex="Arial2" style:font-size-complex="11pt"/>
    </style:style>
    <style:style style:name="P9" style:family="paragraph" style:parent-style-name="Standard">
      <style:paragraph-properties fo:margin-top="0in" fo:margin-bottom="0in" fo:line-height="100%"/>
      <style:text-properties style:font-name="Arial1" fo:font-size="11pt" style:font-size-asian="11pt" style:font-name-complex="Arial2" style:font-size-complex="11pt"/>
    </style:style>
    <style:style style:name="P10" style:family="paragraph" style:parent-style-name="Standard">
      <style:paragraph-properties fo:margin-top="0in" fo:margin-bottom="0in"/>
      <style:text-properties style:font-name="Arial1" fo:font-size="11pt" fo:font-weight="bold" style:font-size-asian="11pt" style:font-weight-asian="bold" style:font-name-complex="Arial2" style:font-size-complex="11pt"/>
    </style:style>
    <style:style style:name="P11" style:family="paragraph" style:parent-style-name="Standard">
      <style:paragraph-properties fo:margin-top="0in" fo:margin-bottom="0in" fo:line-height="100%"/>
      <style:text-properties style:font-name="Arial1" fo:font-size="11pt" fo:font-weight="bold" style:font-size-asian="11pt" style:font-weight-asian="bold" style:font-name-complex="Arial2" style:font-size-complex="11pt"/>
    </style:style>
    <style:style style:name="P12" style:family="paragraph" style:parent-style-name="Standard">
      <style:paragraph-properties fo:margin-top="0in" fo:margin-bottom="0in"/>
      <style:text-properties style:font-name="Arial1" fo:font-size="11pt" fo:font-weight="bold" style:font-size-asian="11pt" style:font-weight-asian="bold" style:font-name-complex="Arial2" style:font-size-complex="11pt" style:font-weight-complex="bold"/>
    </style:style>
    <style:style style:name="P13" style:family="paragraph" style:parent-style-name="Standard">
      <style:paragraph-properties fo:margin-top="0in" fo:margin-bottom="0in"/>
      <style:text-properties style:font-name="Arial1" fo:font-size="11pt" fo:font-style="italic" fo:font-weight="bold" style:font-size-asian="11pt" style:font-style-asian="italic" style:font-weight-asian="bold" style:font-name-complex="Arial2" style:font-size-complex="11pt"/>
    </style:style>
    <style:style style:name="P14" style:family="paragraph" style:parent-style-name="Standard">
      <style:paragraph-properties fo:margin-top="0in" fo:margin-bottom="0in" fo:line-height="100%"/>
      <style:text-properties style:font-name="Arial1" fo:font-size="11pt" fo:font-style="italic" fo:font-weight="bold" style:font-size-asian="11pt" style:font-style-asian="italic" style:font-weight-asian="bold" style:font-name-complex="Arial2" style:font-size-complex="11pt"/>
    </style:style>
    <style:style style:name="P15" style:family="paragraph" style:parent-style-name="Standard">
      <style:paragraph-properties fo:margin-top="0in" fo:margin-bottom="0in"/>
      <style:text-properties style:font-name="Arial1" fo:font-size="11pt" fo:font-weight="normal" style:font-size-asian="11pt" style:font-weight-asian="normal" style:font-name-complex="Arial2" style:font-size-complex="11pt" style:font-weight-complex="normal"/>
    </style:style>
    <style:style style:name="P16" style:family="paragraph" style:parent-style-name="Standard">
      <style:paragraph-properties fo:margin-top="0in" fo:margin-bottom="0in"/>
      <style:text-properties fo:font-size="11pt" style:font-size-asian="11pt" style:font-size-complex="11pt"/>
    </style:style>
    <style:style style:name="P17" style:family="paragraph" style:parent-style-name="List_20_Paragraph">
      <style:paragraph-properties fo:margin-top="0in" fo:margin-bottom="0in"/>
      <style:text-properties style:font-name="Arial1" fo:font-size="11pt" style:font-size-asian="11pt" style:font-name-complex="Arial2" style:font-size-complex="11pt"/>
    </style:style>
    <style:style style:name="P18" style:family="paragraph" style:parent-style-name="Normal_20__28_Web_29_">
      <style:paragraph-properties fo:margin-top="0in" fo:margin-bottom="0in" fo:background-color="#ffffff">
        <style:background-image/>
      </style:paragraph-properties>
      <style:text-properties style:font-name="Arial1" fo:font-size="11pt" style:font-size-asian="11pt" style:font-name-complex="Arial2" style:font-size-complex="11pt"/>
    </style:style>
    <style:style style:name="P19" style:family="paragraph" style:parent-style-name="Normal_20__28_Web_29_">
      <style:paragraph-properties fo:margin-top="0in" fo:margin-bottom="0in" style:line-height-at-least="0.2291in" fo:background-color="#ffffff">
        <style:background-image/>
      </style:paragraph-properties>
      <style:text-properties style:font-name="Arial1" fo:font-size="11pt" style:font-size-asian="11pt" style:font-name-complex="Arial2" style:font-size-complex="11pt" style:font-weight-complex="normal"/>
    </style:style>
    <style:style style:name="P20" style:family="paragraph" style:parent-style-name="Normal_20__28_Web_29_">
      <style:paragraph-properties fo:margin-top="0in" fo:margin-bottom="0in" fo:background-color="#ffffff">
        <style:background-image/>
      </style:paragraph-properties>
      <style:text-properties style:font-name="Arial1" fo:font-size="11pt" fo:font-style="italic" fo:font-weight="bold" style:font-size-asian="11pt" style:font-style-asian="italic" style:font-weight-asian="bold" style:font-name-complex="Arial2" style:font-size-complex="11pt"/>
    </style:style>
    <style:style style:name="P21" style:family="paragraph" style:parent-style-name="Normal_20__28_Web_29_">
      <style:paragraph-properties fo:margin-top="0in" fo:margin-bottom="0in" style:line-height-at-least="0.2291in" fo:background-color="#ffffff">
        <style:background-image/>
      </style:paragraph-properties>
      <style:text-properties style:font-name="Arial1" fo:font-size="11pt" fo:font-style="italic" style:font-size-asian="11pt" style:font-style-asian="italic" style:font-name-complex="Arial2" style:font-size-complex="11pt" style:font-weight-complex="normal"/>
    </style:style>
    <style:style style:name="P22" style:family="paragraph" style:parent-style-name="Normal_20__28_Web_29_">
      <style:paragraph-properties fo:margin-top="0in" fo:margin-bottom="0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23" style:family="paragraph" style:parent-style-name="Normal_20__28_Web_29_">
      <style:paragraph-properties fo:margin-top="0in" fo:margin-bottom="0in" style:line-height-at-least="0.2291in" fo:background-color="#ffffff">
        <style:background-image/>
      </style:paragraph-properties>
      <style:text-properties style:font-name="Arial1" fo:font-size="9pt" fo:font-style="italic" style:font-size-asian="9pt" style:font-style-asian="italic" style:font-name-complex="Arial2" style:font-size-complex="9pt" style:font-weight-complex="normal"/>
    </style:style>
    <style:style style:name="P24" style:family="paragraph" style:parent-style-name="Normal_20__28_Web_29_">
      <style:paragraph-properties fo:margin-top="0in" fo:margin-bottom="0in" style:line-height-at-least="0.2291in" fo:background-color="#ffffff">
        <style:background-image/>
      </style:paragraph-properties>
      <style:text-properties style:font-name="Arial1" fo:font-size="9pt" fo:font-style="italic" fo:font-weight="normal" style:font-size-asian="9pt" style:font-style-asian="italic" style:font-weight-asian="normal" style:font-name-complex="Arial2" style:font-size-complex="9pt" style:font-weight-complex="normal"/>
    </style:style>
    <style:style style:name="P25" style:family="paragraph" style:parent-style-name="Normal_20__28_Web_29_">
      <style:paragraph-properties fo:margin-top="0in" fo:margin-bottom="0in" style:line-height-at-least="0.2291in" fo:background-color="#ffffff">
        <style:background-image/>
      </style:paragraph-properties>
      <style:text-properties style:font-name="Arial1" fo:font-size="9pt" fo:font-weight="normal" style:font-size-asian="9pt" style:font-weight-asian="normal" style:font-name-complex="Arial2" style:font-size-complex="9pt" style:font-weight-complex="normal"/>
    </style:style>
    <style:style style:name="P26" style:family="paragraph" style:parent-style-name="List_20_Paragraph">
      <style:paragraph-properties fo:margin-left="1in" fo:margin-right="0in" fo:margin-top="0in" fo:margin-bottom="0in" fo:text-indent="0in" style:auto-text-indent="false"/>
      <style:text-properties style:font-name="Arial1" fo:font-size="11pt" style:font-size-asian="11pt" style:font-name-complex="Arial2" style:font-size-complex="11pt"/>
    </style:style>
    <style:style style:name="P27" style:family="paragraph" style:parent-style-name="Normal_20__28_Web_29_">
      <style:paragraph-properties fo:margin-top="0.0693in" fo:margin-bottom="0in" style:line-height-at-least="0.2291in" fo:background-color="#ffffff">
        <style:background-image/>
      </style:paragraph-properties>
      <style:text-properties fo:font-size="11pt" style:font-size-asian="11pt" style:font-size-complex="11pt"/>
    </style:style>
    <style:style style:name="P28" style:family="paragraph" style:parent-style-name="Normal_20__28_Web_29_">
      <style:paragraph-properties fo:margin-top="0.0693in" fo:margin-bottom="0in" style:line-height-at-least="0.2291in" fo:background-color="#ffffff">
        <style:background-image/>
      </style:paragraph-properties>
      <style:text-properties style:font-name="Arial1" fo:font-size="11pt" fo:font-weight="bold" style:font-size-asian="11pt" style:font-weight-asian="bold" style:font-name-complex="Arial2" style:font-size-complex="11pt"/>
    </style:style>
    <style:style style:name="P29" style:family="paragraph" style:parent-style-name="Normal_20__28_Web_29_">
      <style:paragraph-properties fo:margin-top="0.0693in" fo:margin-bottom="0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30" style:family="paragraph" style:parent-style-name="Normal_20__28_Web_29_">
      <style:paragraph-properties fo:margin-top="0.0693in" fo:margin-bottom="0in" style:line-height-at-least="0.2291in" fo:background-color="#ffffff">
        <style:background-image/>
      </style:paragraph-properties>
      <style:text-properties style:font-name="Arial1" fo:font-size="11pt" style:font-size-asian="11pt" style:font-name-complex="Arial2" style:font-size-complex="11pt"/>
    </style:style>
    <style:style style:name="P31" style:family="paragraph" style:parent-style-name="Normal_20__28_Web_29_">
      <style:paragraph-properties fo:margin-top="0.0693in" fo:margin-bottom="0in" style:line-height-at-least="0.2291in" fo:background-color="#ffffff">
        <style:background-image/>
      </style:paragraph-properties>
      <style:text-properties style:font-name="Arial1" fo:font-size="11pt" fo:font-style="italic" style:font-size-asian="11pt" style:font-style-asian="italic" style:font-name-complex="Arial2" style:font-size-complex="11pt" style:font-weight-complex="normal"/>
    </style:style>
    <style:style style:name="P32" style:family="paragraph" style:parent-style-name="Title">
      <style:paragraph-properties fo:padding="0in" fo:border="none"/>
    </style:style>
    <style:style style:name="P33" style:family="paragraph" style:parent-style-name="Title">
      <style:paragraph-properties fo:text-align="start" style:justify-single-word="false" fo:padding="0in" fo:border="none"/>
      <style:text-properties fo:font-size="2pt" style:font-size-asian="2pt"/>
    </style:style>
    <style:style style:name="P34" style:family="paragraph" style:parent-style-name="Title">
      <style:paragraph-properties fo:text-align="start" style:justify-single-word="false" fo:padding="0in" fo:border="none"/>
    </style:style>
    <style:style style:name="P35" style:family="paragraph" style:parent-style-name="List_20_Paragraph">
      <style:paragraph-properties fo:margin-left="0in" fo:margin-right="0in" fo:text-indent="0in" style:auto-text-indent="false"/>
      <style:text-properties style:font-name="Arial1" fo:font-size="11pt" style:font-size-asian="11pt" style:font-name-complex="Arial2" style:font-size-complex="11pt"/>
    </style:style>
    <style:style style:name="P36" style:family="paragraph" style:parent-style-name="List_20_Paragraph">
      <style:paragraph-properties fo:margin-left="0in" fo:margin-right="0in" fo:text-indent="0in" style:auto-text-indent="false"/>
      <style:text-properties style:font-name="Arial1" fo:font-size="11pt" fo:font-weight="bold" style:font-size-asian="11pt" style:font-weight-asian="bold" style:font-name-complex="Arial2" style:font-size-complex="11pt"/>
    </style:style>
    <style:style style:name="P37" style:family="paragraph" style:parent-style-name="List_20_Paragraph">
      <style:paragraph-properties fo:margin-left="0in" fo:margin-right="0in" fo:margin-top="0in" fo:margin-bottom="0in" fo:text-indent="0in" style:auto-text-indent="false"/>
      <style:text-properties style:font-name="Arial1" fo:font-size="11pt" style:font-size-asian="11pt" style:font-name-complex="Arial2" style:font-size-complex="11pt"/>
    </style:style>
    <style:style style:name="P38" style:family="paragraph" style:parent-style-name="Standard">
      <style:paragraph-properties fo:margin-left="0in" fo:margin-right="0in" fo:text-indent="0in" style:auto-text-indent="false"/>
      <style:text-properties style:font-name="Arial1" fo:font-size="11pt" style:font-size-asian="11pt" style:font-name-complex="Arial2" style:font-size-complex="11pt"/>
    </style:style>
    <style:style style:name="P39" style:family="paragraph" style:parent-style-name="Standard">
      <style:paragraph-properties fo:margin-left="0in" fo:margin-right="0in" fo:text-indent="0in" style:auto-text-indent="false"/>
      <style:text-properties style:font-name="Arial1" fo:font-size="11pt" fo:font-weight="normal" style:font-size-asian="11pt" style:font-weight-asian="normal" style:font-name-complex="Arial2" style:font-size-complex="11pt" style:font-weight-complex="normal"/>
    </style:style>
    <style:style style:name="P40" style:family="paragraph" style:parent-style-name="List_20_Paragraph">
      <style:paragraph-properties fo:margin-left="0.25in" fo:margin-right="0in" fo:margin-top="0in" fo:margin-bottom="0in" fo:text-indent="0in" style:auto-text-indent="false"/>
      <style:text-properties style:font-name="Arial1" fo:font-size="11pt" fo:font-weight="normal" style:font-size-asian="11pt" style:font-weight-asian="normal" style:font-name-complex="Arial2" style:font-size-complex="11pt"/>
    </style:style>
    <style:style style:name="P41" style:family="paragraph" style:parent-style-name="Normal_20__28_Web_29_">
      <style:paragraph-properties style:line-height-at-least="0.2291in" fo:background-color="#ffffff">
        <style:background-image/>
      </style:paragraph-properties>
      <style:text-properties style:font-name="Arial1" fo:font-size="11pt" fo:font-style="italic" fo:font-weight="normal" style:font-size-asian="11pt" style:font-style-asian="italic" style:font-weight-asian="normal" style:font-name-complex="Arial2" style:font-size-complex="11pt" style:font-weight-complex="normal"/>
    </style:style>
    <style:style style:name="P42" style:family="paragraph" style:parent-style-name="Normal_20__28_Web_29_">
      <style:paragraph-properties style:line-height-at-least="0.2291in" fo:background-color="#ffffff">
        <style:background-image/>
      </style:paragraph-properties>
      <style:text-properties style:font-name="Arial1" fo:font-size="11pt" fo:font-weight="bold" style:font-size-asian="11pt" style:font-weight-asian="bold" style:font-name-complex="Arial2" style:font-size-complex="11pt"/>
    </style:style>
    <style:style style:name="P43" style:family="paragraph" style:parent-style-name="Normal_20__28_Web_29_">
      <style:paragraph-properties style:line-height-at-least="0.2291in" fo:background-color="#ffffff">
        <style:background-image/>
      </style:paragraph-properties>
      <style:text-properties style:font-name="Arial1" fo:font-size="11pt" style:font-size-asian="11pt" style:font-name-complex="Arial2" style:font-size-complex="11pt"/>
    </style:style>
    <style:style style:name="P44" style:family="paragraph" style:parent-style-name="Normal_20__28_Web_29_">
      <style:paragraph-properties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45" style:family="paragraph" style:parent-style-name="Normal_20__28_Web_29_">
      <style:paragraph-properties fo:margin-top="0in" fo:margin-bottom="0.0693in" style:line-height-at-least="0.2291in" fo:background-color="#ffffff">
        <style:background-image/>
      </style:paragraph-properties>
      <style:text-properties style:font-name="Arial1" fo:font-size="11pt" style:font-size-asian="11pt" style:font-name-complex="Arial2" style:font-size-complex="11pt"/>
    </style:style>
    <style:style style:name="P46" style:family="paragraph" style:parent-style-name="Normal_20__28_Web_29_">
      <style:paragraph-properties fo:margin-top="0.1665in" fo:margin-bottom="0.1665in" style:line-height-at-least="0.2291in" fo:background-color="#ffffff">
        <style:background-image/>
      </style:paragraph-properties>
      <style:text-properties style:font-name="Arial1" fo:font-size="11pt" fo:font-weight="bold" style:font-size-asian="11pt" style:font-weight-asian="bold" style:font-name-complex="Arial2" style:font-size-complex="11pt"/>
    </style:style>
    <style:style style:name="P47" style:family="paragraph" style:parent-style-name="List_20_Paragraph">
      <style:paragraph-properties fo:margin-top="0in" fo:margin-bottom="0.0835in"/>
      <style:text-properties style:font-name="Arial1" fo:font-size="11pt" style:font-size-asian="11pt" style:font-name-complex="Arial2" style:font-size-complex="11pt"/>
    </style:style>
    <style:style style:name="P48" style:family="paragraph" style:parent-style-name="Standard">
      <style:paragraph-properties fo:padding-left="0in" fo:padding-right="0in" fo:padding-top="0in" fo:padding-bottom="0.0138in" fo:border-left="none" fo:border-right="none" fo:border-top="none" fo:border-bottom="0.0071in solid #00000a">
        <style:tab-stops>
          <style:tab-stop style:position="0.4374in" style:type="center"/>
          <style:tab-stop style:position="0.6252in" style:type="center"/>
          <style:tab-stop style:position="1in"/>
        </style:tab-stops>
      </style:paragraph-properties>
      <style:text-properties fo:font-size="5pt" fo:font-weight="bold" style:font-size-asian="5pt" style:font-weight-asian="bold" style:font-size-complex="14pt"/>
    </style:style>
    <style:style style:name="P49" style:family="paragraph" style:parent-style-name="Standard">
      <style:paragraph-properties fo:padding-left="0in" fo:padding-right="0in" fo:padding-top="0in" fo:padding-bottom="0.0138in" fo:border-left="none" fo:border-right="none" fo:border-top="none" fo:border-bottom="0.0071in solid #00000a">
        <style:tab-stops>
          <style:tab-stop style:position="0.4374in" style:type="center"/>
          <style:tab-stop style:position="0.6252in" style:type="center"/>
          <style:tab-stop style:position="1in"/>
        </style:tab-stops>
      </style:paragraph-properties>
      <style:text-properties style:font-name="Arial1" fo:font-size="11pt" fo:font-weight="bold" style:font-size-asian="11pt" style:font-weight-asian="bold" style:font-name-complex="Arial2" style:font-size-complex="11pt"/>
    </style:style>
    <style:style style:name="P50" style:family="paragraph" style:parent-style-name="Standard">
      <style:paragraph-properties fo:text-align="start" style:justify-single-word="false" fo:padding-left="0in" fo:padding-right="0in" fo:padding-top="0in" fo:padding-bottom="0.0138in" fo:border-left="none" fo:border-right="none" fo:border-top="none" fo:border-bottom="0.0071in solid #00000a">
        <style:tab-stops>
          <style:tab-stop style:position="0.4374in" style:type="center"/>
          <style:tab-stop style:position="0.6252in" style:type="center"/>
          <style:tab-stop style:position="1in"/>
        </style:tab-stops>
      </style:paragraph-properties>
      <style:text-properties style:font-name="Arial" fo:font-size="11pt" fo:font-weight="bold" style:font-size-asian="11pt" style:font-weight-asian="bold" style:font-name-complex="Arial2" style:font-size-complex="11pt" style:font-weight-complex="bold"/>
    </style:style>
    <style:style style:name="P51" style:family="paragraph" style:parent-style-name="Standard" style:list-style-name="">
      <style:paragraph-properties fo:text-align="start" style:justify-single-word="false" fo:padding-left="0in" fo:padding-right="0in" fo:padding-top="0in" fo:padding-bottom="0.0138in" fo:border-left="none" fo:border-right="none" fo:border-top="none" fo:border-bottom="0.0071in solid #00000a">
        <style:tab-stops>
          <style:tab-stop style:position="0.4374in" style:type="center"/>
          <style:tab-stop style:position="0.6252in" style:type="center"/>
          <style:tab-stop style:position="1in"/>
        </style:tab-stops>
      </style:paragraph-properties>
      <style:text-properties style:font-name="Arial" fo:font-size="11pt" fo:font-weight="bold" style:font-size-asian="11pt" style:font-weight-asian="bold" style:font-name-complex="Arial2" style:font-size-complex="11pt" style:font-weight-complex="bold"/>
    </style:style>
    <style:style style:name="P52" style:family="paragraph" style:parent-style-name="Standard">
      <style:paragraph-properties fo:break-before="page" fo:padding-left="0in" fo:padding-right="0in" fo:padding-top="0in" fo:padding-bottom="0.0138in" fo:border-left="none" fo:border-right="none" fo:border-top="none" fo:border-bottom="0.0071in solid #00000a">
        <style:tab-stops>
          <style:tab-stop style:position="0.4374in" style:type="center"/>
          <style:tab-stop style:position="0.6252in" style:type="center"/>
          <style:tab-stop style:position="1in"/>
        </style:tab-stops>
      </style:paragraph-properties>
      <style:text-properties style:font-name="Arial1" fo:font-size="11pt" fo:font-weight="bold" style:font-size-asian="11pt" style:font-weight-asian="bold" style:font-name-complex="Arial2" style:font-size-complex="11pt"/>
    </style:style>
    <style:style style:name="P53" style:family="paragraph" style:parent-style-name="Standard">
      <style:text-properties style:font-name="Arial1" fo:font-size="11pt" fo:font-weight="normal" style:font-size-asian="11pt" style:font-weight-asian="normal" style:font-name-complex="Arial2" style:font-size-complex="11pt" style:font-weight-complex="normal"/>
    </style:style>
    <style:style style:name="P54" style:family="paragraph" style:parent-style-name="Standard" style:list-style-name="L1">
      <style:text-properties style:font-name="Arial1" fo:font-size="11pt" fo:font-weight="normal" style:font-size-asian="11pt" style:font-weight-asian="normal" style:font-name-complex="Arial2" style:font-size-complex="11pt" style:font-weight-complex="normal"/>
    </style:style>
    <style:style style:name="P55" style:family="paragraph" style:parent-style-name="Standard" style:list-style-name="L2">
      <style:text-properties style:font-name="Arial1" fo:font-size="11pt" fo:font-weight="normal" style:font-size-asian="11pt" style:font-weight-asian="normal" style:font-name-complex="Arial2" style:font-size-complex="11pt" style:font-weight-complex="normal"/>
    </style:style>
    <style:style style:name="P56" style:family="paragraph" style:parent-style-name="Standard">
      <style:text-properties style:font-name="Arial1" fo:font-size="11pt" fo:font-style="italic" fo:font-weight="bold" style:font-size-asian="11pt" style:font-style-asian="italic" style:font-weight-asian="bold" style:font-name-complex="Arial2" style:font-size-complex="11pt" style:font-style-complex="italic" style:font-weight-complex="bold"/>
    </style:style>
    <style:style style:name="P57" style:family="paragraph" style:parent-style-name="Standard">
      <style:paragraph-properties fo:margin-top="0.0693in" fo:margin-bottom="0in" style:line-height-at-least="0.2291in" fo:background-color="#ffffff">
        <style:background-image/>
      </style:paragraph-properties>
      <style:text-properties style:font-name="Arial" fo:font-size="11pt" fo:font-weight="normal" style:font-size-asian="11pt" style:font-weight-asian="normal" style:font-name-complex="Arial2" style:font-size-complex="11pt" style:font-weight-complex="normal"/>
    </style:style>
    <style:style style:name="P58" style:family="paragraph" style:parent-style-name="Standard" style:list-style-name="L4">
      <style:paragraph-properties fo:margin-top="0.0693in" fo:margin-bottom="0in" style:line-height-at-least="0.2291in" fo:background-color="#ffffff">
        <style:background-image/>
      </style:paragraph-properties>
      <style:text-properties style:font-name="Arial" fo:font-size="11pt" fo:font-weight="normal" style:font-size-asian="11pt" style:font-weight-asian="normal" style:font-name-complex="Arial2" style:font-size-complex="11pt" style:font-weight-complex="normal"/>
    </style:style>
    <style:style style:name="P59" style:family="paragraph" style:parent-style-name="Standard" style:list-style-name="L5">
      <style:paragraph-properties fo:margin-top="0.0693in" fo:margin-bottom="0in" style:line-height-at-least="0.2291in" fo:background-color="#ffffff">
        <style:background-image/>
      </style:paragraph-properties>
      <style:text-properties style:font-name="Arial" fo:font-size="11pt" fo:font-weight="normal" style:font-size-asian="11pt" style:font-weight-asian="normal" style:font-name-complex="Arial2" style:font-size-complex="11pt" style:font-weight-complex="normal"/>
    </style:style>
    <style:style style:name="P60" style:family="paragraph" style:parent-style-name="Standard" style:list-style-name="L5">
      <style:paragraph-properties fo:margin-top="0.0693in" fo:margin-bottom="0in" style:line-height-at-least="0.2291in" fo:background-color="#ffffff">
        <style:background-image/>
      </style:paragraph-properties>
    </style:style>
    <style:style style:name="P61" style:family="paragraph" style:parent-style-name="Text_20_body">
      <style:paragraph-properties fo:margin-top="0.0693in" fo:margin-bottom="0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62" style:family="paragraph" style:parent-style-name="Heading_20_2">
      <style:text-properties style:font-name="Tempus Sans ITC" style:font-name-complex="MV Boli"/>
    </style:style>
    <style:style style:name="P63" style:family="paragraph" style:parent-style-name="List_20_Paragraph" style:list-style-name="WWNum29">
      <style:text-properties style:font-name="Arial1" fo:font-size="11pt" style:font-size-asian="11pt" style:font-name-complex="Arial2" style:font-size-complex="11pt"/>
    </style:style>
    <style:style style:name="P64" style:family="paragraph" style:parent-style-name="List_20_Paragraph" style:list-style-name="WWNum31">
      <style:text-properties style:font-name="Arial1" fo:font-size="11pt" style:font-size-asian="11pt" style:font-name-complex="Arial2" style:font-size-complex="11pt"/>
    </style:style>
    <style:style style:name="P65" style:family="paragraph" style:parent-style-name="List_20_Paragraph" style:list-style-name="WWNum32">
      <style:text-properties fo:font-size="11pt" style:font-size-asian="11pt" style:font-size-complex="11pt"/>
    </style:style>
    <style:style style:name="P66" style:family="paragraph" style:parent-style-name="List_20_Paragraph" style:list-style-name="WWNum40">
      <style:text-properties fo:font-size="11pt" style:font-size-asian="11pt" style:font-size-complex="11pt"/>
    </style:style>
    <style:style style:name="P67" style:family="paragraph" style:parent-style-name="List_20_Paragraph" style:list-style-name="WWNum37">
      <style:paragraph-properties fo:margin-top="0in" fo:margin-bottom="0in" fo:line-height="100%"/>
      <style:text-properties style:font-name="Arial1" fo:font-size="11pt" style:font-size-asian="11pt" style:font-name-complex="Arial2" style:font-size-complex="11pt"/>
    </style:style>
    <style:style style:name="P68" style:family="paragraph" style:parent-style-name="List_20_Paragraph" style:list-style-name="WWNum36">
      <style:paragraph-properties fo:margin-top="0in" fo:margin-bottom="0in"/>
      <style:text-properties style:font-name="Arial1" fo:font-size="11pt" style:font-size-asian="11pt" style:font-name-complex="Arial2" style:font-size-complex="11pt"/>
    </style:style>
    <style:style style:name="P69" style:family="paragraph" style:parent-style-name="List_20_Paragraph" style:list-style-name="WWNum35">
      <style:paragraph-properties fo:margin-top="0in" fo:margin-bottom="0in"/>
      <style:text-properties style:font-name="Arial1" fo:font-size="11pt" style:font-size-asian="11pt" style:font-name-complex="Arial2" style:font-size-complex="11pt"/>
    </style:style>
    <style:style style:name="P70" style:family="paragraph" style:parent-style-name="List_20_Paragraph" style:list-style-name="WWNum34">
      <style:paragraph-properties fo:margin-top="0in" fo:margin-bottom="0in"/>
      <style:text-properties style:font-name="Arial1" fo:font-size="11pt" style:font-size-asian="11pt" style:font-name-complex="Arial2" style:font-size-complex="11pt"/>
    </style:style>
    <style:style style:name="P71" style:family="paragraph" style:parent-style-name="List_20_Paragraph" style:list-style-name="WWNum40">
      <style:paragraph-properties fo:margin-top="0in" fo:margin-bottom="0in"/>
      <style:text-properties style:font-name="Arial1" fo:font-size="11pt" style:font-size-asian="11pt" style:font-name-complex="Arial2" style:font-size-complex="11pt"/>
    </style:style>
    <style:style style:name="P72" style:family="paragraph" style:parent-style-name="List_20_Paragraph" style:list-style-name="WWNum40">
      <style:paragraph-properties fo:margin-top="0in" fo:margin-bottom="0in"/>
      <style:text-properties fo:font-size="11pt" style:font-size-asian="11pt" style:font-size-complex="11pt"/>
    </style:style>
    <style:style style:name="P73" style:family="paragraph" style:parent-style-name="List_20_Paragraph" style:list-style-name="WWNum42">
      <style:paragraph-properties fo:margin-top="0in" fo:margin-bottom="0in"/>
      <style:text-properties fo:font-size="11pt" style:font-size-asian="11pt" style:font-size-complex="11pt"/>
    </style:style>
    <style:style style:name="P74" style:family="paragraph" style:parent-style-name="List_20_Paragraph" style:list-style-name="WWNum30">
      <style:paragraph-properties fo:margin-top="0in" fo:margin-bottom="0.0835in"/>
      <style:text-properties style:font-name="Arial1" fo:font-size="11pt" style:font-size-asian="11pt" style:font-name-complex="Arial2" style:font-size-complex="11pt"/>
    </style:style>
    <style:style style:name="P75" style:family="paragraph" style:parent-style-name="List_20_Paragraph" style:list-style-name="WWNum38">
      <style:paragraph-properties fo:margin-top="0in" fo:margin-bottom="0.0835in"/>
      <style:text-properties style:font-name="Arial1" fo:font-size="11pt" style:font-size-asian="11pt" style:font-name-complex="Arial2" style:font-size-complex="11pt"/>
    </style:style>
    <style:style style:name="P76" style:family="paragraph" style:parent-style-name="List_20_Paragraph" style:list-style-name="WWNum38">
      <style:paragraph-properties fo:margin-top="0in" fo:margin-bottom="0.0835in"/>
      <style:text-properties fo:font-size="11pt" style:font-size-asian="11pt" style:font-size-complex="11pt"/>
    </style:style>
    <style:style style:name="P77" style:family="paragraph" style:parent-style-name="Normal_20__28_Web_29_" style:list-style-name="WWNum39">
      <style:paragraph-properties fo:margin-top="0.0693in" fo:margin-bottom="0.0835in" style:line-height-at-least="0.2291in" fo:background-color="#ffffff">
        <style:background-image/>
      </style:paragraph-properties>
      <style:text-properties fo:font-size="11pt" style:font-size-asian="11pt" style:font-size-complex="11pt"/>
    </style:style>
    <style:style style:name="P78" style:family="paragraph" style:parent-style-name="Normal_20__28_Web_29_" style:list-style-name="WWNum43">
      <style:paragraph-properties fo:margin-top="0.0693in" fo:margin-bottom="0.0835in" style:line-height-at-least="0.2291in" fo:background-color="#ffffff">
        <style:background-image/>
      </style:paragraph-properties>
      <style:text-properties fo:font-size="11pt" style:font-size-asian="11pt" style:font-size-complex="11pt"/>
    </style:style>
    <style:style style:name="P79" style:family="paragraph" style:parent-style-name="Normal_20__28_Web_29_" style:list-style-name="WWNum39">
      <style:paragraph-properties fo:margin-top="0.0693in" fo:margin-bottom="0.0835in" style:line-height-at-least="0.2291in" fo:background-color="#ffffff">
        <style:background-image/>
      </style:paragraph-properties>
    </style:style>
    <style:style style:name="P80" style:family="paragraph" style:parent-style-name="Normal_20__28_Web_29_" style:list-style-name="WWNum43">
      <style:paragraph-properties fo:margin-top="0.0693in" fo:margin-bottom="0.0835in" style:line-height-at-least="0.2291in" fo:background-color="#ffffff">
        <style:background-image/>
      </style:paragraph-properties>
      <style:text-properties style:font-name="Arial1" fo:font-size="11pt" style:font-size-asian="11pt" style:font-name-complex="Arial2" style:font-size-complex="11pt"/>
    </style:style>
    <style:style style:name="P81" style:family="paragraph" style:parent-style-name="Normal_20__28_Web_29_" style:list-style-name="WWNum44">
      <style:paragraph-properties fo:margin-top="0.0693in" fo:margin-bottom="0.0835in" style:line-height-at-least="0.2291in" fo:background-color="#ffffff">
        <style:background-image/>
      </style:paragraph-properties>
      <style:text-properties style:font-name="Arial1" fo:font-size="11pt" style:font-size-asian="11pt" style:font-name-complex="Arial2" style:font-size-complex="11pt"/>
    </style:style>
    <style:style style:name="P82" style:family="paragraph" style:parent-style-name="Normal_20__28_Web_29_" style:list-style-name="WWNum46">
      <style:paragraph-properties fo:margin-top="0.0693in" fo:margin-bottom="0.0835in" style:line-height-at-least="0.2291in" fo:background-color="#ffffff">
        <style:background-image/>
      </style:paragraph-properties>
      <style:text-properties style:font-name="Arial1" fo:font-size="11pt" style:font-size-asian="11pt" style:font-name-complex="Arial2" style:font-size-complex="11pt"/>
    </style:style>
    <style:style style:name="P83" style:family="paragraph" style:parent-style-name="Normal_20__28_Web_29_" style:list-style-name="WWNum46">
      <style:paragraph-properties fo:margin-top="0.0693in" fo:margin-bottom="0.0835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84" style:family="paragraph" style:parent-style-name="Normal_20__28_Web_29_" style:list-style-name="WWNum44">
      <style:paragraph-properties fo:margin-top="0in" fo:margin-bottom="0.0835in" fo:background-color="#ffffff">
        <style:background-image/>
      </style:paragraph-properties>
      <style:text-properties style:font-name="Arial1" fo:font-size="11pt" style:font-size-asian="11pt" style:font-name-complex="Arial2" style:font-size-complex="11pt"/>
    </style:style>
    <style:style style:name="P85" style:family="paragraph" style:parent-style-name="Normal_20__28_Web_29_" style:list-style-name="WWNum44">
      <style:paragraph-properties fo:margin-top="0in" fo:margin-bottom="0.0835in" style:line-height-at-least="0.2291in" fo:background-color="#ffffff">
        <style:background-image/>
      </style:paragraph-properties>
      <style:text-properties style:font-name="Arial1" fo:font-size="11pt" style:font-size-asian="11pt" style:font-name-complex="Arial2" style:font-size-complex="11pt"/>
    </style:style>
    <style:style style:name="P86" style:family="paragraph" style:parent-style-name="Normal_20__28_Web_29_" style:list-style-name="WWNum46">
      <style:paragraph-properties fo:margin-top="0in" fo:margin-bottom="0.0835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87" style:family="paragraph" style:parent-style-name="Normal_20__28_Web_29_" style:list-style-name="WWNum46">
      <style:paragraph-properties fo:margin-top="0.1665in" fo:margin-bottom="0.0835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88" style:family="paragraph" style:parent-style-name="Normal_20__28_Web_29_" style:list-style-name="WWNum47">
      <style:paragraph-properties fo:margin-top="0.1665in" fo:margin-bottom="0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P89" style:family="paragraph" style:parent-style-name="Normal_20__28_Web_29_" style:list-style-name="WWNum47">
      <style:paragraph-properties fo:margin-top="0in" fo:margin-bottom="0in" style:line-height-at-least="0.2291in" fo:background-color="#ffffff">
        <style:background-image/>
      </style:paragraph-properties>
      <style:text-properties style:font-name="Arial1" fo:font-size="11pt" fo:font-weight="normal" style:font-size-asian="11pt" style:font-weight-asian="normal" style:font-name-complex="Arial2" style:font-size-complex="11pt" style:font-weight-complex="normal"/>
    </style:style>
    <style:style style:name="T1" style:family="text">
      <style:text-properties fo:font-size="2pt" style:font-size-asian="2pt"/>
    </style:style>
    <style:style style:name="T2" style:family="text">
      <style:text-properties style:font-name="Arial1" style:font-name-complex="Arial2"/>
    </style:style>
    <style:style style:name="T3" style:family="text">
      <style:text-properties style:font-name="Arial1" style:font-name-complex="Arial2" style:font-weight-complex="normal"/>
    </style:style>
    <style:style style:name="T4" style:family="text">
      <style:text-properties style:font-name="Arial1" fo:font-weight="bold" style:font-weight-asian="bold" style:font-name-complex="Arial2"/>
    </style:style>
    <style:style style:name="T5" style:family="text">
      <style:text-properties style:font-name="Arial1" fo:font-weight="bold" style:font-weight-asian="bold" style:font-name-complex="Arial2" style:font-weight-complex="bold"/>
    </style:style>
    <style:style style:name="T6" style:family="text">
      <style:text-properties style:font-name="Arial1" fo:font-style="italic" style:font-style-asian="italic" style:font-name-complex="Arial2" style:font-weight-complex="normal"/>
    </style:style>
    <style:style style:name="T7" style:family="text">
      <style:text-properties style:font-name="Arial1" fo:font-style="italic" fo:font-weight="bold" style:font-style-asian="italic" style:font-weight-asian="bold" style:font-name-complex="Arial2" style:font-weight-complex="bold"/>
    </style:style>
    <style:style style:name="T8" style:family="text">
      <style:text-properties style:font-name="Arial1" fo:font-weight="normal" style:font-weight-asian="normal" style:font-name-complex="Arial2"/>
    </style:style>
    <style:style style:name="T9" style:family="text">
      <style:text-properties style:font-name="Arial1" fo:font-size="11pt" fo:font-weight="bold" style:font-size-asian="11pt" style:font-weight-asian="bold" style:font-name-complex="Arial2" style:font-size-complex="11pt" style:font-weight-complex="bold"/>
    </style:style>
    <style:style style:name="T10" style:family="text">
      <style:text-properties style:font-name="Arial1" fo:font-size="11pt" style:font-size-asian="11pt" style:font-name-complex="Arial2" style:font-size-complex="11pt"/>
    </style:style>
    <style:style style:name="T11" style:family="text">
      <style:text-properties style:font-name="Arial" fo:font-size="11pt" style:font-size-asian="11pt" style:font-size-complex="11pt"/>
    </style:style>
    <style:style style:name="T12" style:family="text">
      <style:text-properties style:font-name="Arial" fo:font-size="11pt" fo:font-weight="normal" style:font-size-asian="11pt" style:font-weight-asian="normal" style:font-size-complex="11pt" style:font-weight-complex="normal"/>
    </style:style>
    <style:style style:name="T13" style:family="text">
      <style:text-properties style:font-name="Arial" fo:font-size="11pt" fo:font-style="normal" fo:font-weight="normal" style:font-size-asian="11pt" style:font-style-asian="normal" style:font-weight-asian="normal" style:font-name-complex="Arial2" style:font-size-complex="11pt" style:font-style-complex="normal" style:font-weight-complex="normal"/>
    </style:style>
    <style:style style:name="T14" style:family="text">
      <style:text-properties style:font-name="Arial" fo:font-size="11pt" fo:font-style="normal" style:font-size-asian="11pt" style:font-style-asian="normal" style:font-name-complex="Arial2" style:font-size-complex="11pt" style:font-style-complex="normal"/>
    </style:style>
    <style:style style:name="T15" style:family="text">
      <style:text-properties style:font-name="Arial" fo:font-style="normal" style:font-style-asian="normal" style:font-style-complex="norma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4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h text:style-name="P32" text:outline-level="1"><draw:frame draw:style-name="fr1" draw:name="graphics1" text:anchor-type="as-char" svg:width="1.5102in" svg:height="1.5102in" draw:z-index="0"><draw:image xlink:href="Pictures/100000000000014C0000014CBE805020.png" xlink:type="simple" xlink:show="embed" xlink:actuate="onLoad"/></draw:frame></text:h>
          </table:table-cell>
          <table:table-cell table:style-name="Table1.A1" office:value-type="string">
            <text:h text:style-name="P33" text:outline-level="1"/>
            <text:h text:style-name="P33" text:outline-level="1"/>
            <text:h text:style-name="P33" text:outline-level="1"/>
            <text:h text:style-name="P33" text:outline-level="1"/>
            <text:h text:style-name="P33" text:outline-level="1"/>
            <text:h text:style-name="P34" text:outline-level="1">Libby Story<text:span text:style-name="T1"> <text:s text:c="33"/></text:span></text:h>
            <text:h text:style-name="P34" text:outline-level="1">Sales Training Manual</text:h>
            <text:p text:style-name="P6">STYLE AUTHENTIC</text:p>
            <text:list xml:id="list2351999973512316812" text:style-name="Outline">
              <text:list-item>
                <text:list>
                  <text:list-item>
                    <text:h text:style-name="P62" text:outline-level="2"/>
                  </text:list-item>
                </text:list>
              </text:list-item>
            </text:list>
          </table:table-cell>
        </table:table-row>
      </table:table>
      <text:h text:style-name="P48" text:outline-level="1"/>
      <text:h text:style-name="P49" text:outline-level="1">100 – THE BASICS OF SELLING</text:h>
      <text:p text:style-name="P2">Selling is based around 4 points:</text:p>
      <text:list xml:id="list9200502204501794852" text:style-name="WWNum29">
        <text:list-item>
          <text:p text:style-name="P63">Be real.</text:p>
        </text:list-item>
        <text:list-item>
          <text:p text:style-name="P63">Be the expert.</text:p>
        </text:list-item>
        <text:list-item>
          <text:p text:style-name="P63">Be the problem solver.</text:p>
        </text:list-item>
        <text:list-item>
          <text:p text:style-name="P63">Be thankful.</text:p>
        </text:list-item>
      </text:list>
      <text:p text:style-name="P11">1. <text:s/>Be real:</text:p>
      <text:p text:style-name="P14">You want the customer to like you. <text:s/>If you are honest and sincere with a customer it will take you a long way with them. </text:p>
      <text:p text:style-name="P9">-Tips on being real:</text:p>
      <text:list xml:id="list5812429257370840885" text:style-name="WWNum37">
        <text:list-item>
          <text:p text:style-name="P67">Get to know your customer.</text:p>
        </text:list-item>
        <text:list-item>
          <text:p text:style-name="P67">Always listen and be in tune to how they react towards your suggestions.</text:p>
        </text:list-item>
      </text:list>
      <text:p text:style-name="P9"/>
      <text:p text:style-name="P11">2. <text:s/>Be the expert:</text:p>
      <text:p text:style-name="P13">You want customers to know that you are knowledgeable and trust your opinion. </text:p>
      <text:p text:style-name="P8">-Tips on being the expert:</text:p>
      <text:list xml:id="list5527359408328665132" text:style-name="WWNum36">
        <text:list-item>
          <text:p text:style-name="P68">Be suggestive and show your awareness of trends. <text:s/></text:p>
        </text:list-item>
        <text:list-item>
          <text:p text:style-name="P68">Offer your opinion but always be aware of their reaction. </text:p>
        </text:list-item>
        <text:list-item>
          <text:p text:style-name="P68">Know where merchandise is in the store and be aware of the brands that we offer. <text:s/></text:p>
        </text:list-item>
      </text:list>
      <text:p text:style-name="P8"/>
      <text:p text:style-name="P10">3. <text:s/>Be the problem solver:</text:p>
      <text:p text:style-name="P13">You want customer to follow your advice.</text:p>
      <text:p text:style-name="P8">-Tips on being problem solver:</text:p>
      <text:list xml:id="list9058882589860071739" text:style-name="WWNum35">
        <text:list-item>
          <text:p text:style-name="P69">Customers usually tell you about their problem areas when you start helping them. <text:s/>Point out how you can solve a problem for them.</text:p>
          <text:list>
            <text:list-item>
              <text:p text:style-name="P69">Example: <text:s/>Customer says - “Tops are just too low for me.” <text:s/>You pick out a bra cami to go under the tops and show her how that fixes the problem.</text:p>
            </text:list-item>
            <text:list-item>
              <text:p text:style-name="P69">Example: <text:s/>Customer says - “I'm too old for this store.” <text:s/>You pick out/style options that are age appropriate for your customer and/or looks they feel comfortable in.</text:p>
            </text:list-item>
          </text:list>
        </text:list-item>
        <text:list-item>
          <text:p text:style-name="P69">If possible, see the merchandise you picked out on them in the dressing room. <text:s/>This will allow you to see any problems and persuade the sale. <text:s/>Give an HONEST opinion. </text:p>
        </text:list-item>
        <text:list-item>
          <text:p text:style-name="P69"><text:soft-page-break/>Always have a solid opinion, especially with a indecisive customer.</text:p>
        </text:list-item>
        <text:list-item>
          <text:p text:style-name="P69">If we don’t have exactly what they want, lead them to something that you know we do have that might work.</text:p>
        </text:list-item>
        <text:list-item>
          <text:p text:style-name="P69">Always offer to look at our other locations.</text:p>
        </text:list-item>
      </text:list>
      <text:p text:style-name="P8"/>
      <text:p text:style-name="P10">4. <text:s/>Be thankful:</text:p>
      <text:p text:style-name="P13">You want your customer to feel and important and return to our store. </text:p>
      <text:p text:style-name="P8">-Tips on being thankful:</text:p>
      <text:list xml:id="list8964335130505857817" text:style-name="WWNum34">
        <text:list-item>
          <text:p text:style-name="P70">Use the customer’s name when referring to them during the whole shopping process. </text:p>
        </text:list-item>
        <text:list-item>
          <text:p text:style-name="P70">Thank them for coming in during check out and again as they walk out of the store. <text:s/></text:p>
        </text:list-item>
      </text:list>
      <text:p text:style-name="P17"/>
      <text:p text:style-name="P3">Give them our business card and print your name on it for them to reference in the future. </text:p>
      <text:h text:style-name="P52" text:outline-level="1">101 – GREETING AND BUILDING RAPPORT</text:h>
      <text:p text:style-name="P2"><text:s/>“You never get a second chance to make a first impression.” <text:s/>This statement is true, especially in retail.</text:p>
      <text:p text:style-name="P3">Enticing customers to come in the door is hard enough, so what if they are turned off by how they are greeted or worse yet, by being ignored? <text:s/>It only takes a few seconds to make an impression, so don’t let it be a bad one. <text:s/></text:p>
      <text:p text:style-name="P5"><text:span text:style-name="T2">Every day we have customers entering the store, and studies show that customers form an impression (good or bad) of the store in as little as 20 seconds. <text:s/>Therefore, in Libby Story stores, we focus on the </text:span><text:span text:style-name="T4">“Stop and Drop in 15” Rule</text:span><text:span text:style-name="T2">. <text:s/>Think of it like your childhood fire drill, “Stop, Drop, and Roll,” but its “Stop and Drop in 15!”</text:span></text:p>
      <text:p text:style-name="P3">This simple rule defines how you should act in those first few crucial seconds. Let’s look at what this means:</text:p>
      <text:p text:style-name="P3">Take action within 15 feet or 15 seconds. <text:s/>This is whenever you see a customer enter the store, or your section, then complete steps one and two within 15 seconds. <text:s/>The same goes whenever a customer comes within 15 feet of you while browsing. </text:p>
      <text:list xml:id="list3091204276019930455" text:style-name="WWNum32">
        <text:list-item>
          <text:p text:style-name="P65"><text:span text:style-name="T4">Step One:</text:span><text:span text:style-name="T2"> Break the ice and let the customer know that you know they are in the store. <text:s/>The best way to do this is by STOPPING what you are doing, making eye contact, and giving a big, genuine smile. <text:s/>These simple acts will go a long way to making the customer feel at ease and help them be open to your approach. <text:s/></text:span></text:p>
        </text:list-item>
        <text:list-item>
          <text:p text:style-name="P65"><text:span text:style-name="T4">Step Two:</text:span><text:span text:style-name="T2"> Now that you have proven your attentiveness and broken the ice with eye contact, DROP whatever you are working on and approach the customer by taking a few steps in their direction. <text:s/>Then, </text:span><text:span text:style-name="T5">stand still </text:span><text:span text:style-name="T2">and give them a friendly “Hello!” Make sure to open your posture by having your body erect and moving your hands away from your body. <text:s/></text:span></text:p>
        </text:list-item>
      </text:list>
      <text:p text:style-name="P35">By enacting the “Stop and Drop in 15” Rule, you will be well down the road to creating the positive first impression that is so important to getting your customer in the buying mood. </text:p>
      <text:p text:style-name="P38"><text:bookmark text:name="hs_cos_wrapper_post_body"/>It's very important to acknowledge the fact that every customer is different. <text:s/>Focus first on making a friend. <text:s/>It's always best to start with, “Hey, how are you today?” <text:s/>Let the customer respond. <text:s/>Use these examples below to continue conversation with the customer based on their response/circumstances. <text:s/></text:p>
      <text:list xml:id="list4491563087031961084" text:style-name="WWNum31">
        <text:list-item>
          <text:p text:style-name="P64">For someone that says they're just looking: <text:s text:c="2"/>“… well my name is ___, I'll be glad to try to tell you where something is located, if you need me.”</text:p>
          <text:list>
            <text:list-item>
              <text:p text:style-name="P64">“try to tell” are important words. <text:s/>This doesn't imply that you are actually going to help the customer, follow them around, or show them anything beyond what they're asking for.</text:p>
            </text:list-item>
          </text:list>
        </text:list-item>
        <text:list-item>
          <text:p text:style-name="P64">For a person that seems like they're in a hurry: <text:s/>“What are you shopping for today?” </text:p>
        </text:list-item>
        <text:list-item>
          <text:p text:style-name="P64"><text:soft-page-break/>For someone that says they're shopping for a special occasion: <text:s/>“Are you looking for anything particular?”</text:p>
        </text:list-item>
        <text:list-item>
          <text:p text:style-name="P64">For a group of girls: <text:s/>“Are y’all having a girls' day?” </text:p>
        </text:list-item>
        <text:list-item>
          <text:p text:style-name="P64">If a man is with them (talk to him, he is usually the one paying) “Do these ladies have you out shopping today?” <text:s/>If he seems antsy, offer him a place to sit. <text:s/></text:p>
        </text:list-item>
        <text:list-item>
          <text:p text:style-name="P64">For a person looking through a stack of clothes/hanging items: <text:s/>“Do you need help finding your size?” </text:p>
        </text:list-item>
        <text:list-item>
          <text:p text:style-name="P64">For a person browsing in shoes: <text:s/>“Do you need help finding a shoe in your size?”</text:p>
        </text:list-item>
        <text:list-item>
          <text:p text:style-name="P64">For a person with lots of shopping bags from other stores: <text:s/>“Did you find any good deals?” <text:s/>or “Did ___ (store) have some good stuff?” Offer to put bags behind the counter to make their shopping experience easier. <text:s/></text:p>
        </text:list-item>
        <text:list-item>
          <text:p text:style-name="P64">For a person with a kid: <text:s/>“Aren't you a great little helper?” <text:s/>or “Awww, he/she is so cute. How old?...” <text:s/>or “Aren't you a great little helper?”</text:p>
        </text:list-item>
      </text:list>
      <text:p text:style-name="P39">If after the initial greeting, you don't feel like you've made much lead way, go for the Opening the Window of Contact. <text:s/>This is done by finding something in common, something not related to the merchandise in front of the customer to <text:s/>build rapport. This requires you to notice something physical like jewelry, clothing, even the type of smartphone the person in front of them has. You then comment on that item with a question and share something related about yourself based on what that customer answered. Use these examples below for Opening the Window of Contact: </text:p>
      <text:list xml:id="list473412978401455464" text:style-name="L1">
        <text:list-item>
          <text:p text:style-name="P54">“I like your shoes. Where did you get those from?”...”Oh, I've been looking for some similar. <text:s/>I'll have to check them out.”</text:p>
        </text:list-item>
        <text:list-item>
          <text:p text:style-name="P54">“I like your necklace. <text:s/>Is that from here?”....”I just bought one the other day, and I love it.”</text:p>
        </text:list-item>
        <text:list-item>
          <text:p text:style-name="P54">“Is that the new ___ phone?”....”How do you like it? <text:s/>I've been thinking about getting it too.”</text:p>
        </text:list-item>
      </text:list>
      <text:p text:style-name="P4">It's always best to inform customers and promos after the initial greeting and opening the window <text:s/>of contact. <text:s/>You can do this by saying, “Oh by the way, we have this ___ going on (and then inform the customer of the details).</text:p>
      <text:list xml:id="list5282737778957662163" text:style-name="L2">
        <text:list-item>
          <text:p text:style-name="P55">“Oh by the way” gives you another chance to continue communication with the customer. <text:s/>It also gives the customer a chance to ask you a question, if needed. <text:s/></text:p>
        </text:list-item>
      </text:list>
      <text:p text:style-name="P4">The Greeting Summary: <text:s text:c="2"/>Customers do not want to be sold. <text:s/>Standing in one place and being genuine reduces the threat of customers thinking you're there to to sell them something and implies you're actually there to help them (whether it's give directions, answer questions, etc.). <text:s/>The greeting is the start of building positive communication between you and your customer. <text:s/>Remember, questions rule the day. <text:s/></text:p>
      <text:p text:style-name="P56"><text:soft-page-break/>Never just greet a customer and then walk away. <text:s/>Be sure to stay within hearing distance (15 feet) and occupy yourself by straightening (while listening, not stalking) the customer. <text:s/>You will often times hear them talking to a friend about something they are looking for and/or see them searching for something. <text:s/>Staying close will give you an opportunity to find out what they're wanting (without questioning them to death) and will give you an opportunity to truly help the customer. <text:s/></text:p>
      <text:p text:style-name="P4"/>
      <text:p text:style-name="P36">Let’s Apply It: Make a list of five original customer greetings and turn in to your manager. It’s always a good idea to have a few greetings in the back of your mind to keep your greetings origina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49" text:outline-level="1"><text:soft-page-break/>102 – HOW TO QUALIFY YOUR CUSTOMER’S NEEDS</text:h>
      <text:p text:style-name="P35">A few common retail mistakes to avoid:</text:p>
      <text:list xml:id="list2603699370384157458" text:style-name="WWNum30">
        <text:list-item>
          <text:p text:style-name="P74">Failing to find out the customer’s requirements of what they need or want. </text:p>
        </text:list-item>
        <text:list-item>
          <text:p text:style-name="P74">Focusing on your own agenda instead of the customer’s.</text:p>
        </text:list-item>
        <text:list-item>
          <text:p text:style-name="P74">Not giving customers the majority of air time – let them do the talking.</text:p>
        </text:list-item>
        <text:list-item>
          <text:p text:style-name="P74">Confusing “telling” with “selling” – listen to what the customer is saying.</text:p>
        </text:list-item>
        <text:list-item>
          <text:p text:style-name="P74">Not being knowledgeable about the product you are selling. You should be able to inform the customer why they need the item. </text:p>
        </text:list-item>
        <text:list-item>
          <text:p text:style-name="P74">Not knowing the prevailing promotions, specials, and regular prices.</text:p>
        </text:list-item>
      </text:list>
      <text:p text:style-name="P35">How to avoid these and identify your customer’s needs:</text:p>
      <text:list xml:id="list5031161429429704578" text:style-name="WWNum38">
        <text:list-item>
          <text:p text:style-name="P76"><text:span text:style-name="T4">Step One:</text:span><text:span text:style-name="T2"> “Who , Who, and You.” <text:s/>Don't always assume the guest is just shopping for themselves. <text:s/>Find out why they are shopping. <text:s/>If they are shopping to find a specific outfit for an event or are just browsing, customers will enjoy the idea that you care what they are looking for. <text:s text:c="2"/>Also, remind them of holidays or events coming up that they might need things for in the future. <text:s/>Examples: <text:s/>birthdays, Mother's Day, Graduation gifts, Summer trips, vacations, etc. <text:s/>The more time you spend asking your customer questions, builds their confidence in you. <text:s/>Questions you might ask include:</text:span></text:p>
          <text:list>
            <text:list-item>
              <text:p text:style-name="P75">Who are you shopping for? <text:s/>Where are you going? <text:s/>Do you have anything particular in mind? <text:s/>What do you like? <text:s/>Why do you like it? <text:s/>Do you want something you can wear again? <text:s/>What type of top/bottom/shoes/jewelry etc. are you wanting to match up with this? <text:s/></text:p>
            </text:list-item>
          </text:list>
        </text:list-item>
      </text:list>
      <text:p text:style-name="P47">So, what if the customer is looking for something you don't have? <text:s/>Keep asking questions and get to the bottom of “why” the customer wants that particular item (so that you can suggest something else you do have to meet their needs).</text:p>
      <text:list xml:id="list35184742" text:continue-numbering="true" text:style-name="WWNum38">
        <text:list-item>
          <text:p text:style-name="P76"><text:span text:style-name="T4">Step Two:</text:span><text:span text:style-name="T2"> Start suggestively selling them items based on your conversation thus far. <text:s/>Make real conversation with the customer as you suggest items. <text:s/>Every customer is used to the normal salesperson/customer scenario, so surprise them with a personable, genuine interest in what they need.</text:span></text:p>
        </text:list-item>
        <text:list-item>
          <text:p text:style-name="P76"><text:span text:style-name="T4">Step Three:</text:span><text:span text:style-name="T2"> Continue talking and working with the customer until you have two or three options for them to try. Focus on the clues that the customer has given you through conversation to help you find what they need. </text:span></text:p>
        </text:list-item>
        <text:list-item>
          <text:p text:style-name="P76"><text:span text:style-name="T5">Step Four: </text:span><text:span text:style-name="T2"><text:s/>Don't judge a customer by their pocket book. <text:s/>Keep showing product or let the customer shop until they are content. <text:s/>Don't let the amount of money you think they will spend effect the amount of money they are actually willing and wanting to spend.</text:span></text:p>
        </text:list-item>
      </text:list>
      <text:p text:style-name="P36">Let’s Apply It: You will perform two mock sales scenarios with your manager to practice suggestive selling and adapting to customer’s preferences. <text:s/></text:p>
      <text:h text:style-name="P52" text:outline-level="1">103 – MOTIVATING YOUR CUSTOMERS TO BUY</text:h>
      <text:p text:style-name="P37">Customers are motivated to shop by their desire or need for an item. <text:s/>Different words and word phrases can help to motivate a customer to buy something that they were on the edge about. <text:s/></text:p>
      <text:list xml:id="list4356003830536071359" text:style-name="WWNum39">
        <text:list-item>
          <text:p text:style-name="P77"><text:span text:style-name="T5">You</text:span><text:span text:style-name="T2"> – One of the first words that should be used. Why? Because it’s all about the customer! This simple word makes the conversation with the customer seem more personal.</text:span></text:p>
        </text:list-item>
        <text:list-item>
          <text:p text:style-name="P77"><text:span text:style-name="T5">Guarantee</text:span><text:span text:style-name="T2"> – Providing a guarantee makes one feel safe with her buying choices.</text:span></text:p>
        </text:list-item>
        <text:list-item>
          <text:p text:style-name="P79"><text:span text:style-name="T9">Discover </text:span><text:span text:style-name="T10">– People are curious and want to find new things. This word can position your products</text:span><text:span text:style-name="apple-converted-space"><text:span text:style-name="T10"> </text:span></text:span><text:span text:style-name="T10">as something new and exciting, just waiting to be found.</text:span></text:p>
        </text:list-item>
        <text:list-item>
          <text:p text:style-name="P77"><text:span text:style-name="T5">Love</text:span><text:span text:style-name="T2"> – As in “You are going to LOVE this product!” Customers want to love their purchases and you can help them do it. Even better…. they want their friends and family to love them when they give a gift that was purchased in Libby Story. </text:span></text:p>
        </text:list-item>
        <text:list-item>
          <text:p text:style-name="P77"><text:span text:style-name="T5">Save</text:span><text:span text:style-name="T2"> – Everyone wants to save something, whether it’s time, money, or trouble.</text:span></text:p>
        </text:list-item>
        <text:list-item>
          <text:p text:style-name="P77"><text:span text:style-name="T5">New </text:span><text:span text:style-name="T2">– Having the newest item out there helps people feel like they’re above and beyond the crowd. Think: keeping up with the Jonses.</text:span></text:p>
        </text:list-item>
        <text:list-item>
          <text:p text:style-name="P77"><text:span text:style-name="T4">One-of-a-kind – </text:span><text:span text:style-name="T2">This phase grabs the attention of customers that want a unique and individual look. <text:s/>If they know that a piece is one-of-a-kind they will feel like they are being trendsetters. <text:s/>A good example to use this phase on is our Lenna Agnes line. </text:span></text:p>
        </text:list-item>
      </text:list>
      <text:p text:style-name="P28">Let’s Apply It: Choose seven new items within the store and “sell” them to your manager by using a phrase containing each of the seven key words above. </text:p>
      <text:p text:style-name="P2"/>
      <text:h text:style-name="P52" text:outline-level="1">104 – MAXIMIZING THE DRESSING ROOM OPPORTUNITY</text:h>
      <text:p text:style-name="P41">“Go for No!” <text:s/>Once a customer is in the fitting room, it’s a perfect opportunity to introduce more merchandise. <text:s/>Keep giving your customer options until they actually say “No.” ---No I'm done, No I do not want to see more, No thanks I'm just finishing up.</text:p>
      <text:list xml:id="list5348771481528563110" text:style-name="WWNum40">
        <text:list-item>
          <text:p text:style-name="P66"><text:span text:style-name="T4">Step One:</text:span><text:span text:style-name="T2"> Once your customer is in the dressing room, stick around and be available for anything they may need. Some customers will come out of the dressing room to view their items in the bigger mirror – nine time out of ten they want your opinion. If the customer does not come out of their room, give them a few minutes and check on them being sure to call them by name. </text:span></text:p>
        </text:list-item>
        <text:list-item>
          <text:p text:style-name="P72"><text:span text:style-name="T4">Step Two:</text:span><text:span text:style-name="T2"> If you don’t feel confident that they are completely satisfied with what they have tried on thus far, find a few more items and nonchalantly place them on their door/in their room, and let them know you have found a few more options for them. <text:s text:c="2"/>Not all customers look over the store completely before trying on, so it's our job to show them what they might have missed. <text:s/></text:span></text:p>
          <text:p text:style-name="P71"/>
        </text:list-item>
        <text:list-item>
          <text:p text:style-name="P72"><text:span text:style-name="T5">Step Three: <text:s/></text:span><text:span text:style-name="T2">Clean as you show. <text:s/>Ask the following questions while they are in the Dressing Room...</text:span></text:p>
          <text:list>
            <text:list-item>
              <text:p text:style-name="P71">“Is everything working for you?” </text:p>
            </text:list-item>
            <text:list-item>
              <text:p text:style-name="P71">“What are you liking and/or not liking?”</text:p>
            </text:list-item>
            <text:list-item>
              <text:p text:style-name="P71">“If you have anything you aren't liking, I can get them out of our way.” </text:p>
            </text:list-item>
            <text:list-item>
              <text:p text:style-name="P71">“Do you have any items you'd like me to take to the register?”</text:p>
              <text:list>
                <text:list-item>
                  <text:p text:style-name="P71">NOTE: <text:s/>Giving a customer too many options can confuse them and lead to no sale at all. It’s always helpful to offer to clear out any unwanted items for the customer as they are trying on to avoid clutter and confusion. <text:s/>Also, taking items to the register is a great opportunity for you to see what items they are liking <text:s/>to suggest more add-ons. <text:s/></text:p>
                </text:list-item>
              </text:list>
            </text:list-item>
          </text:list>
        </text:list-item>
      </text:list>
      <text:p text:style-name="P26"/>
      <text:list xml:id="list8570941431201358312" text:style-name="WWNum42">
        <text:list-item>
          <text:p text:style-name="P73"><text:span text:style-name="T4">Step Three:</text:span><text:span text:style-name="T2"> Once you feel confident that they have found what they are looking for it’s a great idea to suggest items that complement what they have found or complete their look. </text:span></text:p>
          <text:list>
            <text:list-item>
              <text:p text:style-name="P73"><text:span text:style-name="T4">NOTE:</text:span><text:span text:style-name="T2"> If the customer is just browsing and not looking for anything specific, pay attention to what they are adding so that you can suggest/add matching items once they are trying on. <text:s text:c="2"/></text:span></text:p>
            </text:list-item>
          </text:list>
        </text:list-item>
      </text:list>
      <text:p text:style-name="P29">When giving your opinion of the outfit and how it looks be HONEST and suggestive! You don’t want them to buy it and then get home and their best friend tells them that it looks terrible on them. <text:s/></text:p>
      <text:p text:style-name="P40"/>
      <text:p text:style-name="P15"/>
      <text:p text:style-name="P16"><text:span text:style-name="T5">Let’s Apply It:</text:span><text:span text:style-name="T3"> </text:span><text:span text:style-name="T5">Today, bring all of your customers add-ons while they are in the dressing room until you hear them say no.</text:span></text:p>
      <text:p text:style-name="P12"/>
      <text:h text:style-name="P49" text:outline-level="1"><text:soft-page-break/>105 – TECHNICQUES FOR CLOSING THE SALE</text:h>
      <text:list xml:id="list6500716323870000537" text:style-name="WWNum43">
        <text:list-item>
          <text:p text:style-name="P78"><text:span text:style-name="T2">When the customer is finished trying on and is coming out of the dressing room the best thing to ask is if anything worked out for them. <text:s/></text:span><text:span text:style-name="T8">When taking unwanted items from customers that are leaving the dressing room empty handed, always offer to help them find something else.</text:span></text:p>
        </text:list-item>
        <text:list-item>
          <text:p text:style-name="P78"><text:span text:style-name="T2">If the customer is on the fence about buying an item, remember you are the expert! Have a solid opinion about what you think they should choose.</text:span><text:span text:style-name="T4"> A customer is much more likely to listen to someone who is confident and honest with their opinions.</text:span><text:span text:style-name="T2"> </text:span></text:p>
        </text:list-item>
        <text:list-item>
          <text:p text:style-name="P80">If you remember certain outfits that they tried on, you could also ask if they had decided to get the ___ outfit. <text:s/>This gives you the opportunity to once again give them your opinion. <text:s/></text:p>
        </text:list-item>
        <text:list-item>
          <text:p text:style-name="P80">Don’t rush the customer to the register right after they get out of the dressing room. <text:s/>Ask them if you can take the clothes that they already tried on and want and put them behind the register until they are ready. <text:s/>Don’t linger behind the register because it will make the customer feel rushed. </text:p>
        </text:list-item>
        <text:list-item>
          <text:p text:style-name="P80">Allow them time to browse and possibly even try on more clothes. <text:s/>Be sure to suggest jewelry, basics, or other complimentary items to what they are buying. </text:p>
        </text:list-item>
      </text:list>
      <text:p text:style-name="P42"/>
      <text:p text:style-name="P42">Let’s Apply It: Focus on taking wanted items to the register before the customer gets to the register. <text:s/>Allow them more time to look and keep making suggestions until they actually say they're done/ready to check out. <text:s/></text:p>
      <text:p text:style-name="P2"/>
      <text:h text:style-name="P52" text:outline-level="1">106 – FOLLOWING UP AND BUILDING REFERRALS</text:h>
      <text:p text:style-name="P30">Before the customer leaves, it is a good idea to give them a business card with your name written on it. This will enable them to ask for you the next time they come in or even suggest you to their friends. After having a personal shopping experience with a customer, fill out a personal customer sheet so that next time they come in you can remember their size, style, and personal details. <text:s/>This will amaze them and make them feel very important to the store. <text:s/></text:p>
      <text:p text:style-name="P43">It is also important to follow-up with them after they come in. <text:s/></text:p>
      <text:p text:style-name="P20"/>
      <text:p text:style-name="P20">Ways to Follow-up:</text:p>
      <text:p text:style-name="P18"/>
      <text:list xml:id="list7506589309188986668" text:style-name="WWNum44">
        <text:list-item>
          <text:p text:style-name="P84">If you felt a real connection with them you could call them in a few days to see how their outfit worked out. <text:s/></text:p>
        </text:list-item>
        <text:list-item>
          <text:p text:style-name="P85">Another way to follow-up is to send a thank you note. <text:s/>By doing this, the customer knows that you took the time to sit down and hand write them a note of appreciation. <text:s/></text:p>
        </text:list-item>
        <text:list-item>
          <text:p text:style-name="P81">Within the thank you note try to remember things from the conversation that you had with them. <text:s/>This will impress the customer and show them that your conversation with genuine. </text:p>
        </text:list-item>
        <text:list-item>
          <text:p text:style-name="P81">If you haven’t seen a customer in a while, try to touch base with them and get them in the store. </text:p>
        </text:list-item>
        <text:list-item>
          <text:p text:style-name="P85">Be sure to contact your customers when we get new items in that you think they would like. </text:p>
        </text:list-item>
      </text:list>
      <text:p text:style-name="P42"/>
      <text:p text:style-name="P42">Let’s Apply It: For your $100+ sales, be sure to write a personal thank you note and read over it with your manager. <text:s/>For your customers that were going on a trip/had a special occasion, call and ask them how it went (and to share pics using #myLSstyle).</text:p>
      <text:p text:style-name="P42"/>
      <text:p text:style-name="P42"/>
      <text:p text:style-name="P2"/>
      <text:h text:style-name="P52" text:outline-level="1">107 – OVERCOMING OBSTABLES WITH CHALLENGING CUSTOMERS</text:h>
      <text:p text:style-name="P21">The customer is ALWAYS right! </text:p>
      <text:p text:style-name="P23"/>
      <text:p text:style-name="P22">We will not always have the specific item that a customer is looking for; however it is your job to be suggestive and think on your toes in order to persuade the customer in a new direction and save the sale. </text:p>
      <text:p text:style-name="P24"/>
      <text:p text:style-name="P45">Ways to ensure that we take advantage of every customer that comes into our store with a specific need:</text:p>
      <text:list xml:id="list8438865379468891180" text:style-name="WWNum46">
        <text:list-item>
          <text:p text:style-name="P82">Always offer to check our other locations for the item that they are looking for. <text:s/></text:p>
        </text:list-item>
        <text:list-item>
          <text:p text:style-name="P82">If that fails, recommend something else that may be similar. <text:s/>Never come back empty handed. <text:s/>If something is sold out, present something you think they would like. <text:s/></text:p>
        </text:list-item>
        <text:list-item>
          <text:p text:style-name="P82">If we don’t have anything remotely like the item, try to figure out why they need the item and find a new solution.</text:p>
          <text:list>
            <text:list-item>
              <text:p text:style-name="P83">Example: A girl comes in looking for a black and white striped top. If you can’t find one, ask the customer what they are planning to wear the black and white striped top with. <text:s/>Once you know what the bottoms are, you can suggest another top that would match as well. <text:s/></text:p>
            </text:list-item>
          </text:list>
        </text:list-item>
        <text:list-item>
          <text:p text:style-name="P86">Make sure you take clues from what they are telling you based on what you are suggesting and be able to change your suggestions based on the response.</text:p>
        </text:list-item>
        <text:list-item>
          <text:p text:style-name="P87">A lot of customers are difficult when they don’t know what they want. <text:s/>The best way to handle that situation is to be knowledgeable of the merchandise that is available for them. </text:p>
        </text:list-item>
        <text:list-item>
          <text:p text:style-name="P87">Realize that customers are defensive. <text:s/>When a customer is unsure about something that you bring them make a personal remark or compliment that will put the customer at ease and persuade the customer to try it on. </text:p>
        </text:list-item>
      </text:list>
      <text:p text:style-name="P46">Let’s Apply It: Complete a mock scenario with your manager who will portray a “challenging customer”.</text:p>
      <text:p text:style-name="P2"/>
      <text:h text:style-name="P52" text:outline-level="1">108 – IMPACTING THE SALES FLOOR</text:h>
      <text:p text:style-name="P31">Working the sales floor should be a team effort! <text:s/></text:p>
      <text:p text:style-name="P44">If you see another employee with multiple customers, <text:s/>help them out. <text:s/>It is an unspoken rule that we are not trying to steal each others' sale; we are just wanting to help you grow your presentation or make your sale even bigger. <text:s text:c="2"/>You should know that if you start a customer a dressing room and someone else steps in to help, that it is still your sale. <text:s/>You are the one who initiated contact, you are the one that started their dressing room, you are the one with your initials on the dressing room door, and you are the one that has introduced yourself to the customer. <text:s/></text:p>
      <text:p text:style-name="P44">Often times, customers appreciate another person's feedback and opinion. <text:s/>It can really help your sale for another employee to walk by and say, “Oh, I love that.” or “That looks great on you!” <text:s/>Also, often times you may have missed a piece of merchandise that the other employee realizes your customer would love/buy. <text:s/>If another employee steps in to help you, accept their help and don't be threatened. <text:s/>Employees should be aware of the sales floor and all customers at all times. <text:s/>Everyone should know who is with who, and help as much as needed. <text:s/>NEVER ARGUE OVER A CUSTOMER ON THE SALES FLOOR OR SPEAK RUDELY TO EACH OTHER ABOUT BEING WITH A SPECIFIC CUSTOMER. <text:s/></text:p>
      <text:p text:style-name="P44">The goal is for a customer to get to the register and be able to say that _______ (employee name) helped them. <text:s/>But, it's always great to hear that everyone helped the customer, or everyone was so helpful and nice. <text:s/></text:p>
      <text:p text:style-name="P44">Managers never hear the complaint, “oh your staff is too helpful!” <text:s/>What a manager doesn't want to hear is that no one helped them, no one spoke to them, or even worse that an employee was rude, distant, condescending, or abandoned the customer on the sales floor/in the dressing room. <text:s/></text:p>
      <text:p text:style-name="P44"/>
      <text:p text:style-name="P44"><text:s text:c="3"/></text:p>
      <text:p text:style-name="P44"/>
      <text:p text:style-name="P44"/>
      <text:p text:style-name="P44"/>
      <text:p text:style-name="P44"/>
      <text:p text:style-name="P44"/>
      <text:p text:style-name="P44"/>
      <text:p text:style-name="P44"/>
      <text:p text:style-name="P44"/>
      <text:h text:style-name="P49" text:outline-level="1"><text:soft-page-break/>109 – RETAINING CUSTOMERS WITH A COMPLETE CUSTOMER EXPERIENCE</text:h>
      <text:p text:style-name="P27"><text:span text:style-name="T6">EVERY customer needs to have a good Libby Story experience. </text:span><text:span text:style-name="T3"><text:s text:c="2"/></text:span><text:span text:style-name="T6">Customer loyalty can be worth up to 10 times as much as a single person. <text:s/></text:span><text:span text:style-name="T7">It is our goal at Libby Story to make sure every customer leaves happy.</text:span><text:span text:style-name="T6"> <text:s/></text:span></text:p>
      <text:p text:style-name="P44">You should always drop what you are doing to help every customer. <text:s/>Every single customer counts.</text:p>
      <text:p text:style-name="P44">Customers that have negative feedback from our store are far more likely to spread the word than one that has a positive experience. <text:s/>To avoid this, speak to every customer and offer to help in a friendly manor regardless to how they look or are dressed. <text:s/>If you offer and a customer doesn’t need help, back off but still be available if they need help.</text:p>
      <text:p text:style-name="P22">Our business is based on the customers. <text:s/>If there aren’t customers, then there is no business and no one makes money. <text:s/>This is why it is very important to value and work hard to have good customer relationships (and to try to build relationships with every person that walks through the door regardless if you make a sale). <text:s/></text:p>
      <text:p text:style-name="P25"/>
      <text:p text:style-name="P22">The complete customer experience is based on all of the aspects of selling that we have covered. <text:s/></text:p>
      <text:p text:style-name="P25"/>
      <text:p text:style-name="P19">Review the steps:</text:p>
      <text:list xml:id="list6717916535801881774" text:style-name="WWNum47">
        <text:list-item>
          <text:p text:style-name="P88">Greet and start conversation </text:p>
        </text:list-item>
        <text:list-item>
          <text:p text:style-name="P89">Start them a dressing room</text:p>
        </text:list-item>
        <text:list-item>
          <text:p text:style-name="P89">Suggest add-ons</text:p>
        </text:list-item>
        <text:list-item>
          <text:p text:style-name="P89">Follow up in the dressing room</text:p>
        </text:list-item>
        <text:list-item>
          <text:p text:style-name="P89">Check out and thank by name</text:p>
          <text:p text:style-name="P89"/>
        </text:list-item>
      </text:list>
      <text:p text:style-name="P22">All of these steps are important. <text:s/>Try your hardest to stay with the customer the entire time, from the beginning to the check out. <text:s/>Don't stalk the customer, but be available without annoying them. <text:s/></text:p>
      <text:p text:style-name="P22"/>
      <text:p text:style-name="P22"/>
      <text:p text:style-name="P22"/>
      <text:p text:style-name="P22"/>
      <text:p text:style-name="P22"/>
      <text:p text:style-name="P22"/>
      <text:p text:style-name="P22"/>
      <text:p text:style-name="P22"/>
      <text:p text:style-name="P22"/>
      <text:h text:style-name="P50" text:outline-level="1"><text:soft-page-break/>110 - Things You Should Never Do</text:h>
      <text:p text:style-name="P7">Customer service is dependent on you. Here are 48 blunt reminders of what you should never do. <text:s/></text:p>
      <text:p text:style-name="Text_20_body"><text:span text:style-name="T11">1. </text:span><text:span text:style-name="Strong_20_Emphasis"><text:span text:style-name="T11">Do not let anyone enter the shop without a warm greeting</text:span></text:span><text:span text:style-name="T11">. If you can’t or won’t do that, go work elsewhere.</text:span></text:p>
      <text:p text:style-name="Text_20_body"><text:span text:style-name="T11">2. </text:span><text:span text:style-name="Strong_20_Emphasis"><text:span text:style-name="T11">Never say it’s “slow,” “dead,” or voice any negative thought</text:span></text:span><text:span text:style-name="T11">, we get enough of that from cable.</text:span></text:p>
      <text:p text:style-name="Text_20_body"><text:span text:style-name="T11">3. </text:span><text:span text:style-name="Strong_20_Emphasis"><text:span text:style-name="T11">Leave your problems at the door</text:span></text:span><text:span text:style-name="T11"> – no one wants to work with high drama whether that’s your daughter’s lost keys or your boyfriend’s mom had a facial appointment.</text:span></text:p>
      <text:p text:style-name="Text_20_body"><text:span text:style-name="T11">4. </text:span><text:span text:style-name="Strong_20_Emphasis"><text:span text:style-name="T11">Don’t come to work sick</text:span></text:span><text:span text:style-name="T11"> – ever.</text:span></text:p>
      <text:p text:style-name="Text_20_body"><text:span text:style-name="T11">5. </text:span><text:span text:style-name="Strong_20_Emphasis"><text:span text:style-name="T11">Don’t complain about music</text:span></text:span><text:span text:style-name="T11">, it’s playing for the customers, not you.</text:span></text:p>
      <text:p text:style-name="Text_20_body"><text:span text:style-name="T11">6. </text:span><text:span text:style-name="Strong_20_Emphasis"><text:span text:style-name="T11">Don’t arrive late saying there was “traffic.”</text:span></text:span><text:span text:style-name="T11"> Of course there was traffic. <text:s/>Plan accordingly.</text:span></text:p>
      <text:p text:style-name="Text_20_body"><text:span text:style-name="T11">7. </text:span><text:span text:style-name="Strong_20_Emphasis"><text:span text:style-name="T11">Don’t change into work clothes that you’ve had scrunched into your backpack all day</text:span></text:span><text:span text:style-name="T11"> – leave the wrinkled homeless look for the streets.</text:span></text:p>
      <text:p text:style-name="Text_20_body"><text:span text:style-name="T11">8. </text:span><text:span text:style-name="Strong_20_Emphasis"><text:span text:style-name="T11">Don’t keep asking if you can go home early</text:span></text:span><text:span text:style-name="T11"> unless you are prepared to ask if you can come in early for the day after Thanksgiving or Christmas.</text:span></text:p>
      <text:p text:style-name="Text_20_body"><text:span text:style-name="T11">9. </text:span><text:span text:style-name="Strong_20_Emphasis"><text:span text:style-name="T11">Never reply to a customer inquiry with, “No”</text:span></text:span><text:span text:style-name="T11"> unless it is immediately followed with, “But we have…”</text:span></text:p>
      <text:p text:style-name="Text_20_body"><text:span text:style-name="T11">10. </text:span><text:span text:style-name="Strong_20_Emphasis"><text:span text:style-name="T11">Don’t just ask questions that can be answered with a “yes” or “no.” </text:span></text:span><text:span text:style-name="T11">You're paid to converse with customers. <text:s/></text:span></text:p>
      <text:p text:style-name="Text_20_body"><text:span text:style-name="T11">11. </text:span><text:span text:style-name="Strong_20_Emphasis"><text:span text:style-name="T11">Don’t ask if there is “anything else?”</text:span></text:span><text:span text:style-name="T11"> Suggest one item that logically goes with what they are purchasing.</text:span></text:p>
      <text:p text:style-name="Text_20_body"><text:span text:style-name="T11">12. </text:span><text:span text:style-name="Strong_20_Emphasis"><text:span text:style-name="T11">Don’t say you’re “not authorized” to give a discount</text:span></text:span><text:span text:style-name="T11">, they’ll just ask, “Then who is?”</text:span></text:p>
      <text:p text:style-name="Text_20_body"><text:span text:style-name="T11">13. </text:span><text:span text:style-name="Strong_20_Emphasis"><text:span text:style-name="T11">Saying, “No problem” is a problem</text:span></text:span><text:span text:style-name="T11">. It sounds condescending like, “ it’s just you – I’d do the same for my dog.” “You’re welcome” is the “A” answer.</text:span></text:p>
      <text:p text:style-name="Text_20_body"><text:span text:style-name="T11">14. </text:span><text:span text:style-name="Strong_20_Emphasis"><text:span text:style-name="T11">Don’t walk past a discarded wrapper, used diaper or other leave-behinds of customers</text:span></text:span><text:span text:style-name="T11">. Pick it up and dispose accordingly.</text:span></text:p>
      <text:p text:style-name="Text_20_body"><text:span text:style-name="T11">15. </text:span><text:span text:style-name="Strong_20_Emphasis"><text:span text:style-name="T11">Don’t stand in front of the store looking bored. <text:s/></text:span></text:span><text:span text:style-name="Strong_20_Emphasis"><text:span text:style-name="T12">Always be mindful of body language – where your hands/arms are placed, posture, and facial expressions.</text:span></text:span></text:p>
      <text:p text:style-name="Text_20_body"><text:span text:style-name="T11">16. </text:span><text:span text:style-name="Strong_20_Emphasis"><text:span text:style-name="T11">Don't check out.</text:span></text:span><text:span text:style-name="T11"> If you ask, “Did you find everything OK?” listen to the answer and fix whatever is not right.</text:span></text:p>
      <text:p text:style-name="Text_20_body"><text:span text:style-name="T11">17. </text:span><text:span text:style-name="Strong_20_Emphasis"><text:span text:style-name="T11">Never say, “I don’t know”</text:span></text:span><text:span text:style-name="T11"> to any question without following with, “I’ll find out.”</text:span></text:p>
      <text:p text:style-name="Text_20_body"><text:span text:style-name="T11">18. </text:span><text:span text:style-name="Strong_20_Emphasis"><text:span text:style-name="T11">Do not ask, “Have you been helped yet?”</text:span></text:span><text:span text:style-name="T11"> Open your eyes! Know before approaching a customer who has been waited on.</text:span></text:p>
      <text:p text:style-name="Text_20_body"><text:soft-page-break/><text:span text:style-name="T11">19. </text:span><text:span text:style-name="Strong_20_Emphasis"><text:span text:style-name="T11">Never take a return without asking what went wrong</text:span></text:span><text:span text:style-name="T11">. Obviously, something didn’t work and many times it can be fixed or exchanged without refunding the cash.</text:span></text:p>
      <text:p text:style-name="Text_20_body"><text:span text:style-name="T11">20. </text:span><text:span text:style-name="Strong_20_Emphasis"><text:span text:style-name="T11">Do not have a personal conversation</text:span></text:span><text:span text:style-name="T11"> with another employee within earshot of customers. <text:s/>End all personal conversations when you see a customer. <text:s/></text:span></text:p>
      <text:p text:style-name="Text_20_body"><text:span text:style-name="T11">21. </text:span><text:span text:style-name="Strong_20_Emphasis"><text:span text:style-name="T11">Do not eat or drink</text:span></text:span><text:span text:style-name="T11"> in plain view of customers. That means no food visible on a shelf or the counter either. <text:s/>All food and drinks must be kept in the break area. <text:s/></text:span></text:p>
      <text:p text:style-name="Text_20_body"><text:span text:style-name="T11">22. </text:span><text:span text:style-name="Strong_20_Emphasis"><text:span text:style-name="T11">Never reek from perfume, cigarettes or body odor.</text:span></text:span><text:span text:style-name="T11"> You're not a teenage boy. And if you are, don't do it either.</text:span></text:p>
      <text:p text:style-name="Text_20_body"><text:span text:style-name="T11">23. </text:span><text:span text:style-name="Strong_20_Emphasis"><text:span text:style-name="T11">Do not refer to two women as “you guys.” </text:span></text:span><text:span text:style-name="T11">There's a big difference - you can tell by looking.</text:span></text:p>
      <text:p text:style-name="Text_20_body"><text:span text:style-name="T11">24. </text:span><text:span text:style-name="Strong_20_Emphasis"><text:span text:style-name="T11">Never acknowledge one customer over and above another</text:span></text:span><text:span text:style-name="T11">, especially the one in line behind others you do not know. All customers are equal, even if the one at the back of the line is your best, wait until all others have been helped. That's what makes </text:span><text:span text:style-name="Emphasis"><text:span text:style-name="T11">customer</text:span></text:span><text:span text:style-name="T11"> service.</text:span></text:p>
      <text:p text:style-name="Text_20_body"><text:span text:style-name="T11">25. </text:span><text:span text:style-name="Strong_20_Emphasis"><text:span text:style-name="T11">Do not gossip</text:span></text:span><text:span text:style-name="T11"> about co-workers or customers within earshot of customers. Better yet, don’t gossip at all. <text:s/></text:span></text:p>
      <text:p text:style-name="Text_20_body"><text:span text:style-name="T11">26. </text:span><text:span text:style-name="Strong_20_Emphasis"><text:span text:style-name="T11">Don't trick customers</text:span></text:span><text:span text:style-name="T11">. It's not Halloween. If there is a service charge, delivery charge or special order charge, alert your customer before you ring them up. It’s not a secret or a trick. Likewise if something can’t be returned for a full refund after the holidays.</text:span></text:p>
      <text:p text:style-name="Text_20_body"><text:span text:style-name="T11">27. </text:span><text:span text:style-name="Strong_20_Emphasis"><text:span text:style-name="T11">Don't plead ignorance</text:span></text:span><text:span text:style-name="T11">. In the time you're putting merch out or not helping customers learn about the products you sell inside and out. If you sell Zoobie plush toys that are also a soft pillow and a comfy blanket, know something about Zoobie plush all-on-one toys.</text:span></text:p>
      <text:p text:style-name="Text_20_body"><text:span text:style-name="T11">28. </text:span><text:span text:style-name="Strong_20_Emphasis"><text:span text:style-name="T11">Do not ignore a customer</text:span></text:span><text:span text:style-name="T11"> because they are not your customer. Stop, look, listen, lend a hand.</text:span></text:p>
      <text:p text:style-name="Text_20_body"><text:span text:style-name="T11">29. </text:span><text:span text:style-name="Strong_20_Emphasis"><text:span text:style-name="T11">Do not stand behind someone</text:span></text:span><text:span text:style-name="T11"> who is looking at product. It's creepy - especially to women. Make eye contact and stand next to them or in front.</text:span></text:p>
      <text:p text:style-name="Text_20_body"><text:span text:style-name="T11">30. </text:span><text:span text:style-name="Strong_20_Emphasis"><text:span text:style-name="T11">Never blame</text:span></text:span><text:span text:style-name="T11"> the boss, the part-timer, the vendor, the weather or the economy for anything that goes wrong. Just make it right.</text:span></text:p>
      <text:p text:style-name="Text_20_body"><text:span text:style-name="T11">31. </text:span><text:span text:style-name="Strong_20_Emphasis"><text:span text:style-name="T11">Don’t just stand there like a dead fish</text:span></text:span><text:span text:style-name="T11"> or walk away like a customer has swine flu if a customer is having trouble making a decision. Help out by giving them a choice like, “Do you prefer something lighter or darker?” “Something hot or cold?”</text:span></text:p>
      <text:p text:style-name="Text_20_body"><text:span text:style-name="T11">32. </text:span><text:span text:style-name="Strong_20_Emphasis"><text:span text:style-name="T11">Don't vomit on your customers</text:span></text:span><text:span text:style-name="T11">. If someone wants to know your life story, keep it short. If a customer asks about a product, keep it short.</text:span></text:p>
      <text:p text:style-name="Text_20_body"><text:span text:style-name="T11">33. </text:span><text:span text:style-name="Strong_20_Emphasis"><text:span text:style-name="T11">Don’t tell customers you are out of something</text:span></text:span><text:span text:style-name="T11"> before they ask for the missing product.</text:span></text:p>
      <text:p text:style-name="Text_20_body"><text:span text:style-name="T11">34. </text:span><text:span text:style-name="Strong_20_Emphasis"><text:span text:style-name="T11">Do not disappear</text:span></text:span><text:span text:style-name="T11">. We know when you are hiding behind the stacks or in the bathroom. Uncool.</text:span></text:p>
      <text:p text:style-name="Text_20_body"><text:span text:style-name="T11">35. </text:span><text:span text:style-name="Strong_20_Emphasis"><text:span text:style-name="T11">Do not ask customers, “Do you still need time?”</text:span></text:span><text:span text:style-name="T11"> Shopping is not work — until questions like this are asked.</text:span></text:p>
      <text:p text:style-name="Text_20_body"><text:soft-page-break/><text:span text:style-name="T11">36. </text:span><text:span text:style-name="Strong_20_Emphasis"><text:span text:style-name="T11">Never suggest ringing someone</text:span></text:span><text:span text:style-name="T11"> up until the customer explicitly asks for it. If they are holding many items, great customer service means you ask, “Would you like me to place these on the counter so you can free your hands?”</text:span></text:p>
      <text:p text:style-name="Text_20_body"><text:span text:style-name="T11">37. </text:span><text:span text:style-name="Strong_20_Emphasis"><text:span text:style-name="T11">Do not stop your exceptional service after the order is rung up</text:span></text:span><text:span text:style-name="T11">. Final impressions are lasting impressions.</text:span></text:p>
      <text:p text:style-name="Text_20_body"><text:span text:style-name="T11">38. </text:span><text:span text:style-name="Strong_20_Emphasis"><text:span text:style-name="T11">Never dismiss or patronize a customer</text:span></text:span><text:span text:style-name="T11"> who has a complaint; listen, take it seriously, address it.</text:span></text:p>
      <text:p text:style-name="Text_20_body"><text:span text:style-name="T11">39. </text:span><text:span text:style-name="Strong_20_Emphasis"><text:span text:style-name="T11">Never allow bad behavior</text:span></text:span><text:span text:style-name="T11">. If someone is swearing on a cellphone, politely suggest they go outside.</text:span></text:p>
      <text:p text:style-name="Text_20_body"><text:span text:style-name="T11">40. </text:span><text:span text:style-name="Strong_20_Emphasis"><text:span text:style-name="T11">Never hover long enough to make people feel they are being watched</text:span></text:span><text:span text:style-name="T11"> or hurried, especially when they are figuring out what to buy.</text:span></text:p>
      <text:p text:style-name="Text_20_body"><text:span text:style-name="T11">41. </text:span><text:span text:style-name="Strong_20_Emphasis"><text:span text:style-name="T11">Do not show frustration</text:span></text:span><text:span text:style-name="T11">. Your only mission is to serve. Be patient; it’s not easy.</text:span></text:p>
      <text:p text:style-name="Text_20_body"><text:span text:style-name="T11">42. </text:span><text:span text:style-name="Strong_20_Emphasis"><text:span text:style-name="T11">Don’t ask how customers are</text:span></text:span><text:span text:style-name="T11">. You don’t care, they know it.</text:span></text:p>
      <text:p text:style-name="Text_20_body"><text:span text:style-name="T11">43. </text:span><text:span text:style-name="Strong_20_Emphasis"><text:span text:style-name="T11">Don’t ask customers if they have a budget</text:span></text:span><text:span text:style-name="T11">- of course they’ll say cheap-no one willingly says the “sky’s the limit” even if its just for a box of Crayola crayons.</text:span></text:p>
      <text:p text:style-name="Text_20_body"><text:span text:style-name="T11">44. </text:span><text:span text:style-name="Strong_20_Emphasis"><text:span text:style-name="T11">Don’t talk to customers’ backs</text:span></text:span><text:span text:style-name="T11">. Either get in front of them so they know who’s talking to them or shut up. No customer wants to try to figure out where a phantom voice came from.</text:span></text:p>
      <text:p text:style-name="Text_20_body"><text:span text:style-name="T11">45. </text:span><text:span text:style-name="Strong_20_Emphasis"><text:span text:style-name="T11">Don’t thank customers as they are opening the door to leave</text:span></text:span><text:span text:style-name="T11"> if you never spoke to them after they arrived. (See above.)</text:span></text:p>
      <text:p text:style-name="Text_20_body"><text:span text:style-name="T11">46. </text:span><text:span text:style-name="Strong_20_Emphasis"><text:span text:style-name="T11">Don’t hide behind the counter. </text:span></text:span><text:span text:style-name="T11">It's not a castle – customers shouldn’t have to come to you, you should go to them.</text:span></text:p>
      <text:p text:style-name="Text_20_body"><text:span text:style-name="T11">47. </text:span><text:span text:style-name="Strong_20_Emphasis"><text:span text:style-name="T11">Don’t stock</text:span></text:span><text:span text:style-name="T11"> when any customer is in the store. That's not customer service, its stocking</text:span></text:p>
      <text:p text:style-name="Text_20_body"><text:span text:style-name="Strong_20_Emphasis"><text:span text:style-name="T13">48. <text:s/></text:span></text:span><text:span text:style-name="Strong_20_Emphasis"><text:span text:style-name="T14">Just because we don't have an item, don't dismiss a customer.</text:span></text:span><text:span text:style-name="T13"> Be prepared to give directions when people ask if you know where they might buy a particular item. No one wants to hear, “I don’t know.” Try.</text:span></text:p>
      <text:p text:style-name="P61"><text:span text:style-name="T15"/></text:p>
      <text:p text:style-name="P61"><text:span text:style-name="T15"/></text:p>
      <text:p text:style-name="P61"><text:span text:style-name="T15"/></text:p>
      <text:p text:style-name="P61"><text:span text:style-name="T15"/></text:p>
      <text:p text:style-name="P61"><text:span text:style-name="T15"/></text:p>
      <text:p text:style-name="P61"><text:span text:style-name="T15"/></text:p>
      <text:p text:style-name="P61"><text:span text:style-name="T15"/></text:p>
      <text:p text:style-name="P61"><text:span text:style-name="T15"/></text:p>
      <text:p text:style-name="P61"><text:span text:style-name="T15"/></text:p>
      <text:p text:style-name="P61"><text:soft-page-break/><text:span text:style-name="T15"/></text:p>
      <text:h text:style-name="P51" text:outline-level="1">111 – General Product Knowledge &amp; Information</text:h>
      <text:list xml:id="list722496658823259586" text:style-name="L4">
        <text:list-item>
          <text:list>
            <text:list-item>
              <text:p text:style-name="P58"><text:span text:style-name="T16">Stylists should be knowledgeable of all jean brands, styles, and washes available during each season. <text:s/>It is your responsibility to try on jeans to learn how jeans fit different body types.</text:span></text:p>
            </text:list-item>
          </text:list>
        </text:list-item>
      </text:list>
      <text:list xml:id="list1025920296657088242" text:style-name="L5">
        <text:list-item>
          <text:p text:style-name="P60"><text:span text:style-name="T13">We can reorder most styles, so always offer to do so if we do not have exactly what they want.</text:span></text:p>
        </text:list-item>
        <text:list-item>
          <text:p text:style-name="P59"><text:span text:style-name="T16">Brands exclusive to Libby Story include:</text:span></text:p>
          <text:list>
            <text:list-item>
              <text:p text:style-name="P59"><text:span text:style-name="T16">Dear John</text:span></text:p>
            </text:list-item>
            <text:list-item>
              <text:p text:style-name="P59"><text:span text:style-name="T16">Articles of Society</text:span></text:p>
            </text:list-item>
            <text:list-item>
              <text:p text:style-name="P59"><text:span text:style-name="T16">Level 99</text:span></text:p>
            </text:list-item>
            <text:list-item>
              <text:p text:style-name="P59"><text:span text:style-name="T16">Free People</text:span></text:p>
              <text:p text:style-name="P59"><text:span text:style-name="T16"/></text:p>
            </text:list-item>
          </text:list>
        </text:list-item>
      </text:list>
      <text:p text:style-name="P57"><text:span text:style-name="T16"><text:tab/>2. <text:s text:c="2"/>We are considered a Free People “Shop in Shop”---the biggest in our state.</text:span></text:p>
      <text:p text:style-name="P57"><text:span text:style-name="T16"/></text:p>
      <text:p text:style-name="P57"><text:span text:style-name="T16"><text:tab/>3. <text:s/>We wholesale “Libby Story” brand clothing. <text:s text:c="2"/>Styles change for each season (clothing <text:line-break/><text:tab/> <text:s text:c="4"/>and jewelry). <text:s text:c="3"/>This is our own brand that Libby designs, and we do have back stock <text:line-break/><text:tab/> <text:s text:c="4"/>available in most styles. <text:s/>The line shows at the Dallas and Atlanta markets and is <text:line-break/><text:tab/> <text:s text:c="4"/>available in 100+ stores (and is growing). <text:s/></text:span></text:p>
      <text:p text:style-name="P57"><text:span text:style-name="T16"/></text:p>
      <text:p text:style-name="P57"><text:span text:style-name="T16"><text:tab/>4. <text:s/>During swimwear season, each brand offers different fits in swimsuit tops and <text:line-break/><text:tab/> <text:s text:c="4"/>bottoms. <text:s/>Major swim brands we carry are Maaji, O'Neill, and Billabong. <text:s text:c="2"/>Stylists <text:tab/> <text:s text:c="4"/>must learn the different fits and styles available in each brand. <text:s/>For example, one top <text:tab/> <text:s text:c="4"/>may be more supportive for larger busts and one top may be better for smaller busts. <text:s text:c="2"/><text:tab/> <text:s text:c="4"/>One bottom may be full cut, while another may be cheekier. <text:s/></text:span></text:p>
      <text:p text:style-name="P61"><text:span text:style-name="T15"/></text:p>
      <text:p text:style-name="P61"><text:span text:style-name="T15"/></text:p>
      <text:p text:style-name="P61"><text:span text:style-name="T15"/></text:p>
      <text:p text:style-name="P61"><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empus Sans ITC" svg:font-family="'Tempus Sans IT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V Boli" svg:font-family="'MV Bol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top="0in" fo:margin-bottom="0in" fo:line-height="100%" fo:text-align="justify" style:justify-single-word="false" fo:keep-with-next="always"/>
      <style:text-properties style:font-name="Arial1" fo:font-size="9pt" fo:font-weight="bold" style:font-name-asian="Times New Roman1" style:font-size-asian="9pt" style:font-weight-asian="bold" style:font-name-complex="Arial2"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Title" style:family="paragraph" style:parent-style-name="Standard" style:next-style-name="Subtitle" style:default-outline-level="1" style:class="chapter">
      <style:paragraph-properties fo:margin-top="0in" fo:margin-bottom="0in" fo:line-height="100%" fo:text-align="center" style:justify-single-word="false" fo:padding-left="0in" fo:padding-right="0in" fo:padding-top="0in" fo:padding-bottom="0.0138in" fo:border-left="none" fo:border-right="none" fo:border-top="none" fo:border-bottom="0.0071in solid #00000a">
        <style:tab-stops>
          <style:tab-stop style:position="0.4374in" style:type="center"/>
          <style:tab-stop style:position="0.6252in" style:type="center"/>
          <style:tab-stop style:position="1in"/>
        </style:tab-stops>
      </style:paragraph-properties>
      <style:text-properties style:font-name="Arial Black" fo:font-size="22pt" fo:font-weight="bold" style:font-name-asian="Times New Roman1" style:font-size-asian="22pt" style:font-weight-asian="bold" style:font-name-complex="Arial2"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Heading_20_2_20_Char" style:display-name="Heading 2 Char" style:family="text" style:parent-style-name="Default_20_Paragraph_20_Font">
      <style:text-properties style:font-name="Arial1" fo:font-size="9pt" fo:font-weight="bold" style:font-name-asian="Times New Roman1" style:font-size-asian="9pt" style:font-weight-asian="bold" style:font-name-complex="Arial2" style:font-size-complex="12pt"/>
    </style:style>
    <style:style style:name="Title_20_Char" style:display-name="Title Char" style:family="text" style:parent-style-name="Default_20_Paragraph_20_Font">
      <style:text-properties style:font-name="Arial Black" fo:font-size="22pt" fo:font-weight="bold" style:font-name-asian="Times New Roman1" style:font-size-asian="22pt" style:font-weight-asian="bold" style:font-name-complex="Arial2"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text:start-value="10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arl</meta:initial-creator>
    <meta:editing-cycles>32</meta:editing-cycles>
    <meta:creation-date>2014-01-17T16:46:00</meta:creation-date>
    <dc:date>2017-06-27T15:00:34.84</dc:date>
    <meta:editing-duration>PT6H23M33S</meta:editing-duration>
    <meta:generator>OpenOffice/4.1.3$Win32 OpenOffice.org_project/413m1$Build-9783</meta:generator>
    <meta:printed-by>Libby Story Ridgeland</meta:printed-by>
    <meta:print-date>2015-05-19T17:24:44.41</meta:print-date>
    <dc:creator>Libby Story Ridgeland</dc:creator>
    <meta:document-statistic meta:table-count="1" meta:image-count="1" meta:object-count="0" meta:page-count="17" meta:paragraph-count="217" meta:word-count="5484" meta:character-count="301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